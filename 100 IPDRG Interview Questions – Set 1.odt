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" svg:font-family="'Google Sans', Arial, sans-serif"/>
    <style:font-face style:name="OpenSymbol" svg:font-family="OpenSymbol"/>
    <style:font-face style:name="monospace" svg:font-family="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text-line-through-style="none" style:font-name="Arial" fo:font-size="10pt" style:text-underline-style="none" fo:font-weight="bold" style:text-blinking="false" style:font-size-asian="10pt" style:font-size-complex="10pt"/>
    </style:style>
    <style:style style:name="P4" style:family="paragraph" style:parent-style-name="Standard">
      <style:paragraph-properties fo:margin-left="0in" fo:margin-right="0in" fo:margin-top="0.25in" fo:margin-bottom="0.1252in" fo:text-indent="0in" style:auto-text-indent="false" fo:padding="0in" fo:border="none"/>
      <style:text-properties style:text-line-through-style="none" style:font-name="Arial" fo:font-size="10pt" style:text-underline-style="none" fo:font-weight="bold" style:text-blinking="false" style:font-size-asian="10pt" style:font-size-complex="10pt"/>
    </style:style>
    <style:style style:name="P5" style:family="paragraph" style:parent-style-name="Text_20_body" style:list-style-name="L9">
      <style:paragraph-properties fo:margin-top="0in" fo:margin-bottom="0in" fo:padding="0in" fo:border="none"/>
      <style:text-properties style:text-line-through-style="none" style:font-name="Arial" fo:font-size="10pt" style:text-underline-style="none" style:text-blinking="false" style:font-size-asian="10pt" style:font-size-complex="10pt"/>
    </style:style>
    <style:style style:name="P6" style:family="paragraph" style:parent-style-name="Text_20_body" style:list-style-name="L9">
      <style:paragraph-properties fo:margin-top="0in" fo:margin-bottom="0in" fo:padding="0in" fo:border="none"/>
      <style:text-properties style:text-line-through-style="none" style:font-name="Arial" fo:font-size="10pt" style:text-underline-style="none" fo:font-weight="normal" style:text-blinking="false" style:font-size-asian="10pt" style:font-size-complex="10pt"/>
    </style:style>
    <style:style style:name="P7" style:family="paragraph" style:parent-style-name="Text_20_body" style:list-style-name="L1">
      <style:paragraph-properties fo:margin-left="0in" fo:margin-right="0in" fo:margin-top="0in" fo:margin-bottom="0in" fo:text-indent="0in" style:auto-text-indent="false" fo:padding="0in" fo:border="none"/>
      <style:text-properties style:text-line-through-style="none" style:font-name="Arial" fo:font-size="10pt" style:text-underline-style="none" fo:font-weight="normal" style:text-blinking="false" style:font-size-asian="10pt" style:font-size-complex="10pt"/>
    </style:style>
    <style:style style:name="P8" style:family="paragraph" style:parent-style-name="Text_20_body" style:list-style-name="L2">
      <style:paragraph-properties fo:margin-left="0in" fo:margin-right="0in" fo:margin-top="0in" fo:margin-bottom="0in" fo:text-indent="0in" style:auto-text-indent="false" fo:padding="0in" fo:border="none"/>
      <style:text-properties style:text-line-through-style="none" style:font-name="Arial" fo:font-size="10pt" style:text-underline-style="none" fo:font-weight="normal" style:text-blinking="false" style:font-size-asian="10pt" style:font-size-complex="10pt"/>
    </style:style>
    <style:style style:name="P9" style:family="paragraph" style:parent-style-name="Text_20_body" style:list-style-name="L3">
      <style:paragraph-properties fo:margin-left="0in" fo:margin-right="0in" fo:margin-top="0in" fo:margin-bottom="0in" fo:text-indent="0in" style:auto-text-indent="false" fo:padding="0in" fo:border="none"/>
      <style:text-properties style:text-line-through-style="none" style:font-name="Arial" fo:font-size="10pt" style:text-underline-style="none" fo:font-weight="normal" style:text-blinking="false" style:font-size-asian="10pt" style:font-size-complex="10pt"/>
    </style:style>
    <style:style style:name="P10" style:family="paragraph" style:parent-style-name="Text_20_body" style:list-style-name="L4">
      <style:paragraph-properties fo:margin-left="0in" fo:margin-right="0in" fo:margin-top="0in" fo:margin-bottom="0in" fo:text-indent="0in" style:auto-text-indent="false" fo:padding="0in" fo:border="none"/>
      <style:text-properties style:text-line-through-style="none" style:font-name="Arial" fo:font-size="10pt" style:text-underline-style="none" fo:font-weight="normal" style:text-blinking="false" style:font-size-asian="10pt" style:font-size-complex="10pt"/>
    </style:style>
    <style:style style:name="P11" style:family="paragraph" style:parent-style-name="Text_20_body" style:list-style-name="L5">
      <style:paragraph-properties fo:margin-left="0in" fo:margin-right="0in" fo:margin-top="0in" fo:margin-bottom="0in" fo:text-indent="0in" style:auto-text-indent="false" fo:padding="0in" fo:border="none"/>
      <style:text-properties style:text-line-through-style="none" style:font-name="Arial" fo:font-size="10pt" style:text-underline-style="none" fo:font-weight="normal" style:text-blinking="false" style:font-size-asian="10pt" style:font-size-complex="10pt"/>
    </style:style>
    <style:style style:name="P12" style:family="paragraph" style:parent-style-name="Text_20_body" style:list-style-name="L6">
      <style:paragraph-properties fo:margin-left="0in" fo:margin-right="0in" fo:margin-top="0in" fo:margin-bottom="0in" fo:text-indent="0in" style:auto-text-indent="false" fo:padding="0in" fo:border="none"/>
      <style:text-properties style:text-line-through-style="none" style:font-name="Arial" fo:font-size="10pt" style:text-underline-style="none" fo:font-weight="normal" style:text-blinking="false" style:font-size-asian="10pt" style:font-size-complex="10pt"/>
    </style:style>
    <style:style style:name="P13" style:family="paragraph" style:parent-style-name="Text_20_body" style:list-style-name="L9">
      <style:paragraph-properties fo:margin-left="0in" fo:margin-right="0in" fo:margin-top="0in" fo:margin-bottom="0in" fo:text-indent="0in" style:auto-text-indent="false" fo:padding="0in" fo:border="none"/>
      <style:text-properties style:text-line-through-style="none" style:font-name="Arial" fo:font-size="10pt" style:text-underline-style="none" style:text-blinking="false" style:font-size-asian="10pt" style:font-size-complex="10pt"/>
    </style:style>
    <style:style style:name="P14" style:family="paragraph" style:parent-style-name="Text_20_body" style:list-style-name="L2">
      <style:paragraph-properties fo:margin-left="0in" fo:margin-right="0in" fo:margin-top="0in" fo:margin-bottom="0in" fo:text-indent="0in" style:auto-text-indent="false" fo:padding="0in" fo:border="none"/>
    </style:style>
    <style:style style:name="P15" style:family="paragraph" style:parent-style-name="Text_20_body" style:list-style-name="L4">
      <style:paragraph-properties fo:margin-left="0in" fo:margin-right="0in" fo:margin-top="0in" fo:margin-bottom="0in" fo:text-indent="0in" style:auto-text-indent="false" fo:padding="0in" fo:border="none"/>
    </style:style>
    <style:style style:name="P16" style:family="paragraph" style:parent-style-name="Text_20_body" style:list-style-name="L7">
      <style:paragraph-properties fo:margin-left="0in" fo:margin-right="0in" fo:margin-top="0in" fo:margin-bottom="0in" fo:text-indent="0in" style:auto-text-indent="false" fo:padding="0in" fo:border="none"/>
    </style:style>
    <style:style style:name="P17" style:family="paragraph" style:parent-style-name="Text_20_body" style:list-style-name="L8">
      <style:paragraph-properties fo:margin-left="0in" fo:margin-right="0in" fo:margin-top="0in" fo:margin-bottom="0in" fo:text-indent="0in" style:auto-text-indent="false" fo:padding="0in" fo:border="none"/>
    </style:style>
    <style:style style:name="P18" style:family="paragraph" style:parent-style-name="Text_20_body" style:list-style-name="L9">
      <style:paragraph-properties fo:margin-left="0in" fo:margin-right="0in" fo:margin-top="0in" fo:margin-bottom="0in" fo:text-indent="0in" style:auto-text-indent="false" fo:padding="0in" fo:border="none"/>
    </style:style>
    <style:style style:name="P19" style:family="paragraph" style:parent-style-name="Text_20_body" style:list-style-name="L10">
      <style:paragraph-properties fo:margin-left="0in" fo:margin-right="0in" fo:margin-top="0in" fo:margin-bottom="0in" fo:text-indent="0in" style:auto-text-indent="false" fo:padding="0in" fo:border="none"/>
    </style:style>
    <style:style style:name="P20" style:family="paragraph" style:parent-style-name="Text_20_body" style:list-style-name="L11">
      <style:paragraph-properties fo:margin-left="0in" fo:margin-right="0in" fo:margin-top="0in" fo:margin-bottom="0in" fo:text-indent="0in" style:auto-text-indent="false" fo:padding="0in" fo:border="none"/>
    </style:style>
    <style:style style:name="P21" style:family="paragraph" style:parent-style-name="Text_20_body" style:list-style-name="L12">
      <style:paragraph-properties fo:margin-left="0in" fo:margin-right="0in" fo:margin-top="0in" fo:margin-bottom="0in" fo:text-indent="0in" style:auto-text-indent="false" fo:padding="0in" fo:border="none"/>
    </style:style>
    <style:style style:name="P22" style:family="paragraph" style:parent-style-name="Text_20_body" style:list-style-name="L7">
      <style:paragraph-properties fo:margin-left="0in" fo:margin-right="0in" fo:margin-top="0in" fo:margin-bottom="0in" fo:text-indent="0in" style:auto-text-indent="false" fo:padding-left="0in" fo:padding-right="0in" fo:padding-top="0in" fo:padding-bottom="0.0193in" fo:border-left="none" fo:border-right="none" fo:border-top="none" fo:border-bottom="0.0008in solid #f0f2f5" style:writing-mode="lr-tb"/>
    </style:style>
    <style:style style:name="P23" style:family="paragraph" style:parent-style-name="Text_20_body" style:list-style-name="L9">
      <style:paragraph-properties fo:margin-left="0in" fo:margin-right="0in" fo:margin-top="0in" fo:margin-bottom="0in" fo:text-indent="0in" style:auto-text-indent="false" fo:padding-left="0in" fo:padding-right="0in" fo:padding-top="0in" fo:padding-bottom="0.0193in" fo:border-left="none" fo:border-right="none" fo:border-top="none" fo:border-bottom="0.0008in solid #f0f2f5" style:writing-mode="lr-tb"/>
    </style:style>
    <style:style style:name="P24" style:family="paragraph" style:parent-style-name="Text_20_body" style:list-style-name="L12">
      <style:paragraph-properties fo:margin-left="0in" fo:margin-right="0in" fo:margin-top="0in" fo:margin-bottom="0in" fo:text-indent="0in" style:auto-text-indent="false" fo:padding-left="0in" fo:padding-right="0in" fo:padding-top="0in" fo:padding-bottom="0.0193in" fo:border-left="none" fo:border-right="none" fo:border-top="none" fo:border-bottom="0.0008in solid #f0f2f5" style:writing-mode="lr-tb"/>
    </style:style>
    <style:style style:name="P25" style:family="paragraph" style:parent-style-name="Text_20_body">
      <style:paragraph-properties fo:margin-left="0in" fo:margin-right="0in" fo:margin-top="0.25in" fo:margin-bottom="0.1252in" fo:text-indent="0in" style:auto-text-indent="false" fo:padding="0in" fo:border="none"/>
      <style:text-properties style:text-line-through-style="none" style:font-name="Arial" fo:font-size="10pt" style:text-underline-style="none" fo:font-weight="bold" style:text-blinking="false" style:font-size-asian="10pt" style:font-size-complex="10pt"/>
    </style:style>
    <style:style style:name="P26" style:family="paragraph" style:parent-style-name="Horizontal_20_Line">
      <style:text-properties style:font-name="Arial" fo:font-size="10pt" style:font-size-asian="10pt" style:font-size-complex="10pt"/>
    </style:style>
    <style:style style:name="T1" style:family="text">
      <style:text-properties fo:font-weight="normal"/>
    </style:style>
    <style:style style:name="T2" style:family="text">
      <style:text-properties style:text-line-through-style="none" style:font-name="Google Sans" style:text-underline-style="none" fo:font-weight="normal" style:text-blinking="false"/>
    </style:style>
    <style:style style:name="T3" style:family="text">
      <style:text-properties style:text-line-through-style="none" style:font-name="Google Sans" style:text-underline-style="none" fo:font-weight="bold" style:text-blinking="false"/>
    </style:style>
    <style:style style:name="T4" style:family="text">
      <style:text-properties style:text-line-through-style="none" style:font-name="Google Sans" fo:font-size="12pt" style:text-underline-style="none" fo:font-weight="normal" style:text-blinking="false"/>
    </style:style>
    <style:style style:name="T5" style:family="text">
      <style:text-properties style:text-line-through-style="none" style:font-name="Google Sans" fo:font-size="12pt" style:text-underline-style="none" fo:font-weight="bold" style:text-blinking="false"/>
    </style:style>
    <style:style style:name="T6" style:family="text">
      <style:text-properties style:text-line-through-style="none" style:font-name="Google Sans" fo:font-size="10pt" style:text-underline-style="none" fo:font-weight="normal" style:text-blinking="false" style:font-size-asian="10pt" style:font-size-complex="10pt"/>
    </style:style>
    <style:style style:name="T7" style:family="text">
      <style:text-properties style:text-line-through-style="none" style:font-name="Google Sans" fo:font-size="10pt" style:text-underline-style="none" fo:font-weight="bold" style:text-blinking="false" style:font-size-asian="10pt" style:font-size-complex="10pt"/>
    </style:style>
    <style:style style:name="T8" style:family="text">
      <style:text-properties style:text-line-through-style="none" fo:font-size="10pt" style:text-underline-style="none" fo:font-weight="normal" style:text-blinking="false" style:font-size-asian="10pt" style:font-size-complex="10pt"/>
    </style:style>
    <style:style style:name="T9" style:family="text">
      <style:text-properties style:text-line-through-style="none" fo:font-size="10pt" style:text-underline-style="none" fo:font-weight="bold" style:text-blinking="false" style:font-size-asian="10pt" style:font-size-complex="10pt"/>
    </style:style>
    <style:style style:name="T10" style:family="text">
      <style:text-properties style:text-line-through-style="none" style:font-name="Arial" fo:font-size="10pt" style:text-underline-style="none" fo:font-weight="normal" style:text-blinking="false" style:font-size-asian="10pt" style:font-size-complex="10pt"/>
    </style:style>
    <style:style style:name="T11" style:family="text">
      <style:text-properties style:text-line-through-style="none" style:font-name="Arial" fo:font-size="10pt" style:text-underline-style="none" fo:font-weight="bold" style:text-blinking="false" style:font-size-asian="10pt" style:font-size-complex="10pt"/>
    </style:style>
    <style:style style:name="T12" style:family="text">
      <style:text-properties style:text-line-through-style="none" style:font-name="Arial" fo:font-size="12pt" style:text-underline-style="none" fo:font-weight="bold" style:text-blinking="false"/>
    </style:style>
    <style:style style:name="T13" style:family="text">
      <style:text-properties style:text-line-through-style="none" style:font-name="Arial" fo:font-size="12pt" style:text-underline-style="none" fo:font-weight="normal" style:text-blinking="false"/>
    </style:style>
    <style:style style:name="T14" style:family="text">
      <style:text-properties style:text-line-through-style="none" style:font-name="Arial" fo:font-size="10.5pt" style:text-underline-style="none" fo:font-weight="normal" style:text-blinking="false"/>
    </style:style>
    <style:style style:name="T15" style:family="text">
      <style:text-properties style:text-line-through-style="none" style:font-name="Arial" style:text-underline-style="none" fo:font-weight="bold" style:text-blinking="false"/>
    </style:style>
    <style:style style:name="T16" style:family="text">
      <style:text-properties style:text-line-through-style="none" style:font-name="Arial" style:text-underline-style="none" fo:font-weight="normal" style:text-blinking="false"/>
    </style:style>
    <style:style style:name="T17" style:family="text">
      <style:text-properties style:text-line-through-style="none" style:font-name="monospace" fo:font-size="10.5pt" style:text-underline-style="none" fo:font-weight="normal" style:text-blinking="false"/>
    </style:style>
    <style:style style:name="T18" style:family="text">
      <style:text-properties style:text-line-through-style="none" fo:font-size="12pt" style:text-underline-style="none" fo:font-weight="bold" style:text-blinking="false"/>
    </style:style>
    <style:style style:name="T19" style:family="text">
      <style:text-properties style:text-line-through-style="none" fo:font-size="12pt" style:text-underline-style="none" fo:font-weight="normal" style:text-blinking="false"/>
    </style:style>
    <style:style style:name="T20" style:family="text">
      <style:text-properties style:text-line-through-style="none" fo:font-size="10.5pt" style:text-underline-style="none" fo:font-weight="normal" style:text-blinking="false"/>
    </style:style>
    <style:style style:name="T21" style:family="text">
      <style:text-properties style:font-name="Google Sans" fo:font-size="13.5pt" fo:font-weight="normal"/>
    </style:style>
    <style:style style:name="T22" style:family="text">
      <style:text-properties fo:font-size="13.5pt" fo:font-weight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2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4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6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76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9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 text:start-value="2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 text:start-value="4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 text:start-value="61">
        <style:list-level-properties text:space-before="-0.1965in" text:min-label-width="0.1965in"/>
      </text:list-level-style-number>
      <text:list-level-style-bullet text:level="2" text:style-name="Bullet_20_Symbols" style:num-suffix="." text:bullet-char="•">
        <style:list-level-properties text:space-before="-0.1965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number text:level="1" text:style-name="Numbering_20_Symbols" style:num-suffix="." style:num-format="1" text:start-value="76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 text:start-value="9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00 IPDRG Interview Questions – Set 1 </text:p>
      <text:p text:style-name="P4">Section 1: ICD-10-CM Coding Guidelines &amp; Sequencing</text:p>
      <text:list xml:id="list9120635361955673613" text:style-name="L1">
        <text:list-item>
          <text:p text:style-name="P7">How do you determine the principal diagnosis when two or more contrasting conditions equally meet UHDDS criteria?</text:p>
        </text:list-item>
        <text:list-item>
          <text:p text:style-name="P7">What are the definitive sequencing rules for severe sepsis due to a localized post-operative wound infection?</text:p>
        </text:list-item>
        <text:list-item>
          <text:p text:style-name="P7">How do you sequence acute respiratory failure when it occurs alongside an acute COPD exacerbation?</text:p>
        </text:list-item>
        <text:list-item>
          <text:p text:style-name="P7">When a guideline says "code first underlying condition," can the manifestation code ever be sequenced first?</text:p>
        </text:list-item>
        <text:list-item>
          <text:p text:style-name="P7">Under what specific clinical circumstances can a symptom code be legally assigned as the principal diagnosis?</text:p>
        </text:list-item>
        <text:list-item>
          <text:p text:style-name="P7">Explain the sequencing rules for a patient admitted for inpatient rehabilitation following an acute CVA.</text:p>
        </text:list-item>
        <text:list-item>
          <text:p text:style-name="P7">What is the correct sequencing for an inpatient stay dedicated solely to prophylactic organ removal?</text:p>
        </text:list-item>
        <text:list-item>
          <text:p text:style-name="P7">How do you sequence diagnoses when a patient is admitted directly from outpatient surgery due to a complication?</text:p>
        </text:list-item>
        <text:list-item>
          <text:p text:style-name="P7">Can an external cause code (V00-Y99) ever be sequenced as a principal diagnosis? Explain your rationale.</text:p>
        </text:list-item>
        <text:list-item>
          <text:p text:style-name="P7">How do you sequence acute kidney injury (AKI) when it presents alongside hyperkalemia and profound dehydration?</text:p>
        </text:list-item>
        <text:list-item>
          <text:p text:style-name="P7">What are the rules for sequencing an acute myocardial infarction (AMI) if the patient transfers from another facility?</text:p>
        </text:list-item>
        <text:list-item>
          <text:p text:style-name="P7">How do you sequence an admission for chemotherapy when the patient develops severe, uncontrollable dehydration during the stay?</text:p>
        </text:list-item>
        <text:list-item>
          <text:p text:style-name="P7">What is the sequencing rule for severe protein-calorie malnutrition when the patient has underlying advanced esophageal cancer?</text:p>
        </text:list-item>
        <text:list-item>
          <text:p text:style-name="P7">How do you sequence conditions for a diabetic patient presenting with both a foot ulcer and osteomyelitis?</text:p>
        </text:list-item>
        <text:list-item>
          <text:p text:style-name="P7">Explain how to sequence a secondary condition that is discovered incidentally during an unrelated inpatient surgery.</text:p>
        </text:list-item>
        <text:list-item>
          <text:p text:style-name="P7">How do you sequence acute blood loss anemia versus the active gastrointestinal bleed that caused it?</text:p>
        </text:list-item>
        <text:list-item>
          <text:p text:style-name="P7">What are the rules for sequencing maternal complications versus fetal conditions on a maternal inpatient record?</text:p>
        </text:list-item>
        <text:list-item>
          <text:p text:style-name="P7">How do you sequence diagnoses for a patient admitted with toxic encephalopathy due to hepatic cirrhosis?</text:p>
        </text:list-item>
        <text:list-item>
          <text:p text:style-name="P7">Explain the sequencing priority when a patient presents with a traumatic hip fracture and an active acute ischemic stroke.</text:p>
        </text:list-item>
        <text:list-item>
          <text:p text:style-name="P7">When is it appropriate to sequence a late effect (sequela) code before the residual condition itself?</text:p>
        </text:list-item>
      </text:list>
      <text:p text:style-name="P25">Section 2: ICD-10-PCS Root Operations &amp; Approach</text:p>
      <text:list xml:id="list6903099365493195530" text:style-name="L2">
        <text:list-item>
          <text:p text:style-name="P14"><text:span text:style-name="T10">What is the definitive technical difference between the root operations </text:span><text:span text:style-name="Strong_20_Emphasis"><text:span text:style-name="T11">Excision</text:span></text:span><text:span text:style-name="T10"> and </text:span><text:span text:style-name="Strong_20_Emphasis"><text:span text:style-name="T11">Resection</text:span></text:span><text:span text:style-name="T10">?</text:span></text:p>
        </text:list-item>
        <text:list-item>
          <text:p text:style-name="P14"><text:span text:style-name="T10">How do you distinguish between </text:span><text:span text:style-name="Strong_20_Emphasis"><text:span text:style-name="T11">Extraction</text:span></text:span><text:span text:style-name="T10"> and </text:span><text:span text:style-name="Strong_20_Emphasis"><text:span text:style-name="T11">Extirpation</text:span></text:span><text:span text:style-name="T10"> when reviewing an operative report?</text:span></text:p>
        </text:list-item>
        <text:list-item>
          <text:p text:style-name="P14"><text:span text:style-name="T10">Under what conditions do you assign the root operation </text:span><text:span text:style-name="Strong_20_Emphasis"><text:span text:style-name="T11">Destruction</text:span></text:span><text:span text:style-name="T10"> instead of </text:span><text:span text:style-name="Strong_20_Emphasis"><text:span text:style-name="T11">Excision</text:span></text:span><text:span text:style-name="T10">?</text:span></text:p>
        </text:list-item>
        <text:list-item>
          <text:p text:style-name="P14"><text:span text:style-name="T10">Explain the difference between </text:span><text:span text:style-name="Strong_20_Emphasis"><text:span text:style-name="T11">Fragmentation</text:span></text:span><text:span text:style-name="T10"> and </text:span><text:span text:style-name="Strong_20_Emphasis"><text:span text:style-name="T11">Extirpation</text:span></text:span><text:span text:style-name="T10"> during a complex kidney stone procedure.</text:span></text:p>
        </text:list-item>
        <text:list-item>
          <text:p text:style-name="P14"><text:span text:style-name="T10">Define the root operation </text:span><text:span text:style-name="Strong_20_Emphasis"><text:span text:style-name="T11">Restriction</text:span></text:span><text:span text:style-name="T10"> and provide a common inpatient cardiovascular surgical example.</text:span></text:p>
        </text:list-item>
        <text:list-item>
          <text:p text:style-name="P14"><text:span text:style-name="T10">When coding a spinal fusion, how do you determine the root operation </text:span><text:span text:style-name="Strong_20_Emphasis"><text:span text:style-name="T11">Fusion</text:span></text:span><text:span text:style-name="T10"> versus </text:span><text:span text:style-name="Strong_20_Emphasis"><text:span text:style-name="T11">Supplement</text:span></text:span><text:span text:style-name="T10">?</text:span></text:p>
        </text:list-item>
        <text:list-item>
          <text:p text:style-name="P8">What root operation is assigned when a surgeon replaces a biological heart valve with a mechanical valve?</text:p>
        </text:list-item>
        <text:list-item>
          <text:p text:style-name="P8">How do you code an exploratory laparotomy where no definitive surgical treatment is ultimately performed?</text:p>
        </text:list-item>
        <text:list-item>
          <text:p text:style-name="P14"><text:span text:style-name="T10">Describe the structural difference between the root operations </text:span><text:span text:style-name="Strong_20_Emphasis"><text:span text:style-name="T11">Drainage</text:span></text:span><text:span text:style-name="T10"> and </text:span><text:span text:style-name="Strong_20_Emphasis"><text:span text:style-name="T11">Bypass</text:span></text:span><text:span text:style-name="T10">.</text:span></text:p>
        </text:list-item>
        <text:list-item>
          <text:p text:style-name="P8">If a patient undergoes a total abdominal hysterectomy and bilateral salpingo-oophorectomy, how many PCS codes do you generate?</text:p>
        </text:list-item>
        <text:list-item>
          <text:p text:style-name="P8">What root operation is assigned for a percutaneous transluminal coronary angioplasty (PTCA) performed without a stent?</text:p>
        </text:list-item>
        <text:list-item>
          <text:p text:style-name="P14"><text:span text:style-name="T10">What root operation is assigned if a PTCA is performed </text:span><text:span text:style-name="Emphasis"><text:span text:style-name="T10">with</text:span></text:span><text:span text:style-name="T10"> a drug-eluting stent placement?</text:span></text:p>
        </text:list-item>
        <text:list-item>
          <text:p text:style-name="P8">How do you determine the correct approach character for a laparoscopic procedure converted to an open laparotomy?</text:p>
        </text:list-item>
        <text:list-item>
          <text:p text:style-name="P8">What constitutes a "Via Natural or Artificial Opening Endoscopic" approach versus a "Percutaneous Endoscopic" approach?</text:p>
        </text:list-item>
        <text:list-item>
          <text:p text:style-name="P8">How do you code a procedure where a diagnostic biopsy is immediately followed by a therapeutic resection of <text:soft-page-break/>that same site?</text:p>
        </text:list-item>
        <text:list-item>
          <text:p text:style-name="P8">What root operation is utilized for a non-excisional, excisional, or versatile sharp debridement of skin?</text:p>
        </text:list-item>
        <text:list-item>
          <text:p text:style-name="P14"><text:span text:style-name="T10">Explain how to code the application of a skin graft using the root operation </text:span><text:span text:style-name="Strong_20_Emphasis"><text:span text:style-name="T11">Replacement</text:span></text:span><text:span text:style-name="T10"> versus </text:span><text:span text:style-name="Strong_20_Emphasis"><text:span text:style-name="T11">Supplement</text:span></text:span><text:span text:style-name="T10">.</text:span></text:p>
        </text:list-item>
        <text:list-item>
          <text:p text:style-name="P8">Which root operation is selected when a foreign body is removed from a deep muscle layer?</text:p>
        </text:list-item>
        <text:list-item>
          <text:p text:style-name="P8">How do you code a mechanical ventilation procedure lasting 48 consecutive hours? Identify the section and root operation.</text:p>
        </text:list-item>
        <text:list-item>
          <text:p text:style-name="P8">What root operation is assigned when a physician places a chest tube for a pneumothorax?</text:p>
        </text:list-item>
      </text:list>
      <text:p text:style-name="P25">Section 3: DRG Logic, MCC, &amp; CC Impact</text:p>
      <text:list xml:id="list3467730043719287213" text:style-name="L3">
        <text:list-item>
          <text:p text:style-name="P9">Explain the structural and architectural differences between the MS-DRG system and the APR-DRG system.</text:p>
        </text:list-item>
        <text:list-item>
          <text:p text:style-name="P9">How does a single Major Complication/Comorbidity (MCC) alter the reimbursement and relative weight of an MS-DRG triad?</text:p>
        </text:list-item>
        <text:list-item>
          <text:p text:style-name="P9">Provide three examples of common inpatient diagnoses that consistently act as an MCC.</text:p>
        </text:list-item>
        <text:list-item>
          <text:p text:style-name="P9">Provide three examples of common inpatient diagnoses that consistently act as a Complication/Comorbidity (CC).</text:p>
        </text:list-item>
        <text:list-item>
          <text:p text:style-name="P9">Explain the concept of "Top-Overlapping" or DRG assignment logic based on operating room procedures vs. principal diagnoses.</text:p>
        </text:list-item>
        <text:list-item>
          <text:p text:style-name="P9">How does a non-operating room procedure affect MS-DRG assignment? Give a concrete example.</text:p>
        </text:list-item>
        <text:list-item>
          <text:p text:style-name="P9">What is an "Unrelated Operating Room Procedure" DRG (MS-DRGs 981-983), and how does a coder accidentally trigger it?</text:p>
        </text:list-item>
        <text:list-item>
          <text:p text:style-name="P9">How does the presence of acute respiratory failure change the DRG for a patient admitted with acute pancreatitis?</text:p>
        </text:list-item>
        <text:list-item>
          <text:p text:style-name="P9">If a patient has multiple CCs documented, does it increase the MS-DRG weight more than having just one CC?</text:p>
        </text:list-item>
        <text:list-item>
          <text:p text:style-name="P9">Explain how stage 3 or stage 4 pressure ulcers impact DRG assignment compared to stage 1 or stage 2.</text:p>
        </text:list-item>
        <text:list-item>
          <text:p text:style-name="P9">What is the DRG impact of assigning a code for morbid obesity with a BMI of 45 vs. simple obesity?</text:p>
        </text:list-item>
        <text:list-item>
          <text:p text:style-name="P9">How does a diagnosis of pancytopenia due to chemotherapy affect the DRG calculation for an oncology admission?</text:p>
        </text:list-item>
        <text:list-item>
          <text:p text:style-name="P9">Explain how the addition of an acute delirium diagnosis changes a DRG for a geriatric orthopedic patient.</text:p>
        </text:list-item>
        <text:list-item>
          <text:p text:style-name="P9">What happens to the DRG if a patient is discharged "against medical advice" (AMA) early in their stay?</text:p>
        </text:list-item>
        <text:list-item>
          <text:p text:style-name="P9">How do CC/MCC exclusions work within the MS-DRG grouper logic?</text:p>
        </text:list-item>
        <text:list-item>
          <text:p text:style-name="P9">Explain why chronic obstructive pulmonary disease (COPD) does not act as a CC when the principal diagnosis is acute exacerbation of COPD.</text:p>
        </text:list-item>
        <text:list-item>
          <text:p text:style-name="P9">How does a secondary diagnosis of aspiration pneumonia alter the DRG for a patient with a principal stroke diagnosis?</text:p>
        </text:list-item>
        <text:list-item>
          <text:p text:style-name="P9">What is the impact of coding a hierarchical condition category (HCC) vs. a traditional CC/MCC in an inpatient setting?</text:p>
        </text:list-item>
        <text:list-item>
          <text:p text:style-name="P9">How does an intracranial hemorrhage impact the DRG weight for a patient undergoing a major craniotomy?</text:p>
        </text:list-item>
        <text:list-item>
          <text:p text:style-name="P9">Explain the financial and regulatory risk of "DRG Creep" or upcoding.</text:p>
        </text:list-item>
      </text:list>
      <text:p text:style-name="P25">Section 4: Present on Admission (POA) &amp; Hospital-Acquired Conditions (HAC)</text:p>
      <text:list xml:id="list2037484538724820954" text:style-name="L4">
        <text:list-item>
          <text:p text:style-name="P10">Define the four primary POA indicators (Y, N, U, W) and what each signifies.</text:p>
        </text:list-item>
        <text:list-item>
          <text:p text:style-name="P10">How do you assign a POA indicator when the documentation is conflicting or unclear at the time of admission?</text:p>
        </text:list-item>
        <text:list-item>
          <text:p text:style-name="P10">Explain the direct relationship between POA indicators and Hospital-Acquired Conditions (HAC).</text:p>
        </text:list-item>
        <text:list-item>
          <text:p text:style-name="P10">If a patient develops a catheter-associated urinary tract infection (CAUTI) on day three of admission, what is the POA indicator?</text:p>
        </text:list-item>
        <text:list-item>
          <text:p text:style-name="P10">How does a HAC with a POA indicator of "N" (No) affect the hospital’s DRG reimbursement?</text:p>
        </text:list-item>
        <text:list-item>
          <text:p text:style-name="P10">When a patient is admitted with a pressure ulcer that worsens from stage 2 to stage 4 during the stay, how is the POA reported?</text:p>
        </text:list-item>
        <text:list-item>
          <text:p text:style-name="P10">What POA indicator do you assign to an external cause of injury code for a fall that happened inside the hospital?</text:p>
        </text:list-item>
        <text:list-item>
          <text:p text:style-name="P10">If a condition is diagnosed during an outpatient observation stay and the patient is subsequently admitted to inpatient, what is the POA status?</text:p>
        </text:list-item>
        <text:list-item>
          <text:p text:style-name="P10">How do you handle POA assignment for congenital conditions or anomalies?</text:p>
        </text:list-item>
        <text:list-item>
          <text:p text:style-name="P10">What is the POA indicator for a condition that is suspected, probable, or rule-out at the time of discharge?</text:p>
        </text:list-item>
        <text:list-item>
          <text:p text:style-name="P15"><text:span text:style-name="T10">If a patient is admitted with a retained surgical foreign body from a surgery performed at a </text:span><text:span text:style-name="Emphasis"><text:span text:style-name="T10">different</text:span></text:span><text:span text:style-name="T10"> facility, what </text:span><text:soft-page-break/><text:span text:style-name="T10">is the POA indicator?</text:span></text:p>
        </text:list-item>
        <text:list-item>
          <text:p text:style-name="P10">How do you assign POA for a patient who presents with a hip fracture resulting from a fall in the emergency room just prior to admission?</text:p>
        </text:list-item>
        <text:list-item>
          <text:p text:style-name="P10">Name three conditions that fall under the CMS Hospital-Acquired Conditions (HAC) reduction program list.</text:p>
        </text:list-item>
        <text:list-item>
          <text:p text:style-name="P10">How do you assign the POA indicator if the clinical documentation is completely silent regarding whether the condition was present?</text:p>
        </text:list-item>
        <text:list-item>
          <text:p text:style-name="P10">Explain how a POA indicator of "U" (Unknown) affects DRG grouping for potential HACs.</text:p>
        </text:list-item>
      </text:list>
      <text:p text:style-name="P25">Section 5: CDI Collaboration &amp; Physician Queries</text:p>
      <text:list xml:id="list8293086171966616531" text:style-name="L5">
        <text:list-item>
          <text:p text:style-name="P11">What are the specific criteria established by AHIMA/ACDIS for a compliant, non-leading physician query?</text:p>
        </text:list-item>
        <text:list-item>
          <text:p text:style-name="P11">When is it clinically and legally necessary to query a physician for "linkage" between two conditions?</text:p>
        </text:list-item>
        <text:list-item>
          <text:p text:style-name="P11">Scenario: The lab shows a creatinine level of 2.4 (baseline 0.8), but the doctor only documents "dehydration." What do you do?</text:p>
        </text:list-item>
        <text:list-item>
          <text:p text:style-name="P11">How do you query a physician when a consultant diagnoses "urosepsis" but the attending writes "UTI"?</text:p>
        </text:list-item>
        <text:list-item>
          <text:p text:style-name="P11">What clinical indicators would you look for in a chart to justify a query for Acute Respiratory Failure?</text:p>
        </text:list-item>
        <text:list-item>
          <text:p text:style-name="P11">When should you query for the specific type of heart failure (systolic vs. diastolic, acute vs. chronic)?</text:p>
        </text:list-item>
        <text:list-item>
          <text:p text:style-name="P11">If a physician responds to a query after the patient is discharged, can you legally use that documentation for coding?</text:p>
        </text:list-item>
        <text:list-item>
          <text:p text:style-name="P11">How do you handle a situation where a physician responds to a query with "possible" or "probable" in an inpatient chart?</text:p>
        </text:list-item>
        <text:list-item>
          <text:p text:style-name="P11">What is a "leading query," and why must it be avoided during DRG optimization?</text:p>
        </text:list-item>
        <text:list-item>
          <text:p text:style-name="P11">How do you handle an attending physician who routinely ignores or rejects compliant CDI queries?</text:p>
        </text:list-item>
        <text:list-item>
          <text:p text:style-name="P11">Scenario: The physician documents "malnutrition." What clinical indicators prompt you to query for severe protein-calorie malnutrition (severe malnutrition)?</text:p>
        </text:list-item>
        <text:list-item>
          <text:p text:style-name="P11">When is a query required for altered mental status vs. encephalopathy?</text:p>
        </text:list-item>
        <text:list-item>
          <text:p text:style-name="P11">How do you handle conflicting documentation between an infectious disease specialist and the attending physician regarding sepsis?</text:p>
        </text:list-item>
        <text:list-item>
          <text:p text:style-name="P11">Describe how you would write a query for a patient with an elevated troponin level and chest pain without using diagnostic words that lead the provider.</text:p>
        </text:list-item>
        <text:list-item>
          <text:p text:style-name="P11">Why is it important to query for the specific type of shock (e.g., septic, cardiogenic, hypovolemic)?</text:p>
        </text:list-item>
      </text:list>
      <text:p text:style-name="P25">Section 6: Regulatory Compliance, Audits, &amp; Case Studies</text:p>
      <text:list xml:id="list349557751102604728" text:style-name="L6">
        <text:list-item>
          <text:p text:style-name="P12">What is the role of the RAC (Recovery Audit Contractor) concerning inpatient DRG reviews?</text:p>
        </text:list-item>
        <text:list-item>
          <text:p text:style-name="P12">Explain the "Two-Midnight Rule" and how it impacts inpatient admission certification and coding.</text:p>
        </text:list-item>
        <text:list-item>
          <text:p text:style-name="P12">How do you handle a medical record where the documentation supports a higher-paying DRG, but the clinical criteria for that diagnosis are missing?</text:p>
        </text:list-item>
        <text:list-item>
          <text:p text:style-name="P12">What steps do you take when your internal audit reveals a systemic error in coding a specific PCS root operation across your facility?</text:p>
        </text:list-item>
        <text:list-item>
          <text:p text:style-name="P12">Define the term "Unbundling" in the context of inpatient procedure coding.</text:p>
        </text:list-item>
        <text:list-item>
          <text:p text:style-name="P12">Case Study: A patient is admitted with altered mental status, high fever, and WBC of 18,000. Urine culture is positive for E. coli. The provider documents "urosepsis." Explain your coding actions.</text:p>
        </text:list-item>
        <text:list-item>
          <text:p text:style-name="P12">Case Study: A patient undergoes a laparoscopic cholecystectomy. The gallbladder is perforated during extraction, spilling bile, requiring extensive irrigation. How does this impact your ICD-10-CM and PCS selection?</text:p>
        </text:list-item>
        <text:list-item>
          <text:p text:style-name="P12">Case Study: A patient with stage IV chronic kidney disease receives a kidney transplant. Two weeks post-op, they are admitted with acute kidney failure of the transplant. What are your primary codes?</text:p>
        </text:list-item>
        <text:list-item>
          <text:p text:style-name="P12">How do you utilize the UHDDS (Uniform Hospital Discharge Data Set) definitions to defend an audit challenge on your principal diagnosis selection?</text:p>
        </text:list-item>
        <text:list-item>
          <text:p text:style-name="P12">How do you stay updated with the annual October 1st ICD-10-CM/PCS code updates and CMS IPPS final rule changes?</text:p>
        </text:list-item>
      </text:list>
      <text:p text:style-name="P1"/>
      <text:p text:style-name="P2">Answers:</text:p>
      <text:p text:style-name="P3">Section 1: ICD-10-CM Coding Guidelines &amp; Sequencing</text:p>
      <text:list xml:id="list5816326097306877973" text:style-name="L7">
        <text:list-item>
          <text:p text:style-name="P16"><text:span text:style-name="Strong_20_Emphasis"><text:span text:style-name="T11">UHDDS Choice Rules</text:span></text:span><text:span text:style-name="T10">: Sequence the condition that required the most resource-intensive workup, evaluation, or therapeutic management during the stay.</text:span></text:p>
        </text:list-item>
        <text:list-item>
          <text:p text:style-name="P22"><text:span text:style-name="Strong_20_Emphasis"><text:span text:style-name="T11">Sepsis Post-Op Wound Infection</text:span></text:span><text:span text:style-name="T10">: Sequence the post-operative complication code first (e.g., </text:span><text:span text:style-name="Source_20_Text"><text:span text:style-name="T10">T81.4-</text:span></text:span><text:span text:style-name="T10">), followed </text:span><text:soft-page-break/><text:span text:style-name="T10">by code </text:span><text:span text:style-name="Source_20_Text"><text:span text:style-name="T10">A41.9</text:span></text:span><text:span text:style-name="T10"> (Sepsis, unspecified organism) or the specific organism code, and code </text:span><text:span text:style-name="Source_20_Text"><text:span text:style-name="T10">R65.21</text:span></text:span><text:span text:style-name="T10"> (Severe sepsis with septic shock).</text:span></text:p>
        </text:list-item>
        <text:list-item>
          <text:p text:style-name="P22"><text:span text:style-name="Strong_20_Emphasis"><text:span text:style-name="T11">Acute Respiratory Failure &amp; COPD Exacerbation</text:span></text:span><text:span text:style-name="T10">: Sequence Acute Respiratory Failure (</text:span><text:span text:style-name="Source_20_Text"><text:span text:style-name="T10">J96.0-</text:span></text:span><text:span text:style-name="T10">) first if it is the primary reason prompting admission, or Acute COPD Exacerbation (</text:span><text:span text:style-name="Source_20_Text"><text:span text:style-name="T10">J44.1</text:span></text:span><text:span text:style-name="T10">) first if the respiratory failure developed after admission or is a minor component of the overall presentation.</text:span></text:p>
        </text:list-item>
        <text:list-item>
          <text:p text:style-name="P16"><text:span text:style-name="Strong_20_Emphasis"><text:span text:style-name="T11">Manifestation Code Sequencing</text:span></text:span><text:span text:style-name="T10">: No. Manifestation codes carry an instructional note explicitly banning them from being principal diagnoses; they must follow their underlying etiology code.</text:span></text:p>
        </text:list-item>
        <text:list-item>
          <text:p text:style-name="P16"><text:span text:style-name="Strong_20_Emphasis"><text:span text:style-name="T11">Symptom as Principal</text:span></text:span><text:span text:style-name="T10">: A symptom code is assigned as principal only when no definitive, underlying diagnosis is established or confirmed by the provider by the time of discharge.</text:span></text:p>
        </text:list-item>
        <text:list-item>
          <text:p text:style-name="P22"><text:span text:style-name="Strong_20_Emphasis"><text:span text:style-name="T11">CVA Rehab</text:span></text:span><text:span text:style-name="T10">: Sequence the appropriate rehabilitation code first (e.g., </text:span><text:span text:style-name="Source_20_Text"><text:span text:style-name="T10">Z51.89</text:span></text:span><text:span text:style-name="T10">), followed by the specific sequela code indicating the neurological deficits caused by the past CVA (e.g., </text:span><text:span text:style-name="Source_20_Text"><text:span text:style-name="T10">I69.35-</text:span></text:span><text:span text:style-name="T10">).</text:span></text:p>
        </text:list-item>
        <text:list-item>
          <text:p text:style-name="P22"><text:span text:style-name="Strong_20_Emphasis"><text:span text:style-name="T11">Prophylactic Organ Removal</text:span></text:span><text:span text:style-name="T10">: Sequence the genetic or family history susceptibility code first (e.g., </text:span><text:span text:style-name="Source_20_Text"><text:span text:style-name="T10">Z80.-</text:span></text:span><text:span text:style-name="T10"> or </text:span><text:span text:style-name="Source_20_Text"><text:span text:style-name="T10">Z15.-</text:span></text:span><text:span text:style-name="T10">), followed by the encounter code for prophylactic surgery (</text:span><text:span text:style-name="Source_20_Text"><text:span text:style-name="T10">Z40.-</text:span></text:span><text:span text:style-name="T10">).</text:span></text:p>
        </text:list-item>
        <text:list-item>
          <text:p text:style-name="P16"><text:span text:style-name="Strong_20_Emphasis"><text:span text:style-name="T11">Outpatient Surgery Complication Admission</text:span></text:span><text:span text:style-name="T10">: Sequence the specific post-operative complication code that necessitated the inpatient admission as the principal diagnosis.</text:span></text:p>
        </text:list-item>
        <text:list-item>
          <text:p text:style-name="P16"><text:span text:style-name="Strong_20_Emphasis"><text:span text:style-name="T11">External Cause Code as Principal</text:span></text:span><text:span text:style-name="T10">: Never. Inpatient guidelines state that external cause codes (V00-Y99) are strictly secondary codes used to provide contextual data regarding how an injury occurred.</text:span></text:p>
        </text:list-item>
        <text:list-item>
          <text:p text:style-name="P22"><text:span text:style-name="Strong_20_Emphasis"><text:span text:style-name="T11">AKI, Dehydration, Hyperkalemia</text:span></text:span><text:span text:style-name="T10">: Sequence AKI (</text:span><text:span text:style-name="Source_20_Text"><text:span text:style-name="T10">N17.9</text:span></text:span><text:span text:style-name="T10">) first if it required the bulk of treatment/monitoring, followed by dehydration and hyperkalemia; if AKI was a transient effect of dehydration, dehydration (</text:span><text:span text:style-name="Source_20_Text"><text:span text:style-name="T10">E86.0</text:span></text:span><text:span text:style-name="T10">) may be sequenced first.</text:span></text:p>
        </text:list-item>
        <text:list-item>
          <text:p text:style-name="P22"><text:span text:style-name="Strong_20_Emphasis"><text:span text:style-name="T11">AMI Transfer</text:span></text:span><text:span text:style-name="T10">: Sequence the specific AMI code (e.g., </text:span><text:span text:style-name="Source_20_Text"><text:span text:style-name="T10">I21.-</text:span></text:span><text:span text:style-name="T10">) as principal at the receiving facility, provided the infarction is still acute and requiring active, definitive intervention.</text:span></text:p>
        </text:list-item>
        <text:list-item>
          <text:p text:style-name="P22"><text:span text:style-name="Strong_20_Emphasis"><text:span text:style-name="T11">Chemo Admission and Dehydration</text:span></text:span><text:span text:style-name="T10">: Sequence the encounter for chemotherapy (</text:span><text:span text:style-name="Source_20_Text"><text:span text:style-name="T10">Z51.11</text:span></text:span><text:span text:style-name="T10">) first, and sequence the severe dehydration (</text:span><text:span text:style-name="Source_20_Text"><text:span text:style-name="T10">E86.0</text:span></text:span><text:span text:style-name="T10">) as a secondary diagnosis.</text:span></text:p>
        </text:list-item>
        <text:list-item>
          <text:p text:style-name="P22"><text:span text:style-name="Strong_20_Emphasis"><text:span text:style-name="T11">Malnutrition &amp; Esophageal Cancer</text:span></text:span><text:span text:style-name="T10">: Sequence the advanced esophageal cancer (</text:span><text:span text:style-name="Source_20_Text"><text:span text:style-name="T10">C15.-</text:span></text:span><text:span text:style-name="T10">) first if the admission is primarily targeted at treating or managing the malignancy.</text:span></text:p>
        </text:list-item>
        <text:list-item>
          <text:p text:style-name="P22"><text:span text:style-name="Strong_20_Emphasis"><text:span text:style-name="T11">Diabetic Foot Ulcer with Osteomyelitis</text:span></text:span><text:span text:style-name="T10">: Sequence the diabetes with foot ulcer code first (e.g., </text:span><text:span text:style-name="Source_20_Text"><text:span text:style-name="T10">E11.621</text:span></text:span><text:span text:style-name="T10">), followed by the code for the ulcer site/severity, and then the osteomyelitis code (</text:span><text:span text:style-name="Source_20_Text"><text:span text:style-name="T10">M86.-</text:span></text:span><text:span text:style-name="T10">).</text:span></text:p>
        </text:list-item>
        <text:list-item>
          <text:p text:style-name="P16"><text:span text:style-name="Strong_20_Emphasis"><text:span text:style-name="T11">Incidental Surgical Finding</text:span></text:span><text:span text:style-name="T10">: Sequence the condition that originally prompted the surgical admission as principal; the incidental finding is sequenced as a secondary diagnosis.</text:span></text:p>
        </text:list-item>
        <text:list-item>
          <text:p text:style-name="P22"><text:span text:style-name="Strong_20_Emphasis"><text:span text:style-name="T11">Acute Blood Loss Anemia vs GI Bleed</text:span></text:span><text:span text:style-name="T10">: Sequence the gastrointestinal hemorrhage code first (e.g., </text:span><text:span text:style-name="Source_20_Text"><text:span text:style-name="T10">K92.2</text:span></text:span><text:span text:style-name="T10">), followed by acute blood loss anemia (</text:span><text:span text:style-name="Source_20_Text"><text:span text:style-name="T10">D62</text:span></text:span><text:span text:style-name="T10">) as a secondary condition.</text:span></text:p>
        </text:list-item>
        <text:list-item>
          <text:p text:style-name="P16"><text:span text:style-name="Strong_20_Emphasis"><text:span text:style-name="T11">Maternal vs Fetal Sequencing</text:span></text:span><text:span text:style-name="T10">: Sequence the maternal complication code (Chapter 15) first on the mother’s chart; fetal conditions are only coded if they directly affect the management of the mother's care.</text:span></text:p>
        </text:list-item>
        <text:list-item>
          <text:p text:style-name="P22"><text:span text:style-name="Strong_20_Emphasis"><text:span text:style-name="T11">Hepatic Encephalopathy</text:span></text:span><text:span text:style-name="T10">: Sequence the underlying hepatic cirrhosis code first (e.g., </text:span><text:span text:style-name="Source_20_Text"><text:span text:style-name="T10">K74.6-</text:span></text:span><text:span text:style-name="T10">), followed by the code for hepatic failure with encephalopathy (</text:span><text:span text:style-name="Source_20_Text"><text:span text:style-name="T10">K72.-</text:span></text:span><text:span text:style-name="T10">).</text:span></text:p>
        </text:list-item>
        <text:list-item>
          <text:p text:style-name="P22"><text:span text:style-name="Strong_20_Emphasis"><text:span text:style-name="T11">Traumatic Fracture &amp; Acute Stroke</text:span></text:span><text:span text:style-name="T10">: Sequence the acute ischemic stroke (</text:span><text:span text:style-name="Source_20_Text"><text:span text:style-name="T10">I63.-</text:span></text:span><text:span text:style-name="T10">) first if it is more life-threatening and resource-intensive, or the fracture code if the admission was primarily for urgent orthopedic surgery.</text:span></text:p>
        </text:list-item>
        <text:list-item>
          <text:p text:style-name="P16"><text:span text:style-name="Strong_20_Emphasis"><text:span text:style-name="T11">Sequela Code First</text:span></text:span><text:span text:style-name="T10">: Never. The residual condition (e.g., paralysis) is always sequenced first, followed by the sequela code (e.g., late effect of CVA) to explain its origin.</text:span></text:p>
        </text:list-item>
      </text:list>
      <text:p text:style-name="P26"/>
      <text:p text:style-name="P25">Section 2: ICD-10-PCS Root Operations &amp; Approach</text:p>
      <text:list xml:id="list4925940120140684328" text:style-name="L8">
        <text:list-item>
          <text:p text:style-name="P17"><text:span text:style-name="Strong_20_Emphasis"><text:span text:style-name="T11">Excision vs Resection</text:span></text:span><text:span text:style-name="T10">: Excision is the cutting out or off of a </text:span><text:span text:style-name="Emphasis"><text:span text:style-name="T10">portion</text:span></text:span><text:span text:style-name="T10"> of a body part; Resection is the cutting out or off of the </text:span><text:span text:style-name="Emphasis"><text:span text:style-name="T10">entire</text:span></text:span><text:span text:style-name="T10"> body part.</text:span></text:p>
        </text:list-item>
        <text:list-item>
          <text:p text:style-name="P17"><text:span text:style-name="Strong_20_Emphasis"><text:span text:style-name="T11">Extraction vs Extirpation</text:span></text:span><text:span text:style-name="T10">: Extraction involves pulling or stripping out all or a portion of a body part by force; Extirpation involves taking or cutting out </text:span><text:span text:style-name="Emphasis"><text:span text:style-name="T10">solid foreign matter</text:span></text:span><text:span text:style-name="T10"> (like a clot or stone) from a body part.</text:span></text:p>
        </text:list-item>
        <text:list-item>
          <text:p text:style-name="P17"><text:span text:style-name="Strong_20_Emphasis"><text:span text:style-name="T11">Destruction vs Excision</text:span></text:span><text:span text:style-name="T10">: Destruction uses physical eradication (e.g., ablation, cautery, cryotherapy) to destroy a body part without taking it out; Excision involves physical cutting to remove a piece.</text:span></text:p>
        </text:list-item>
        <text:list-item>
          <text:p text:style-name="P17"><text:span text:style-name="Strong_20_Emphasis"><text:span text:style-name="T11">Fragmentation vs Extirpation</text:span></text:span><text:span text:style-name="T10">: Fragmentation breaks solid matter into pieces without removing it from the </text:span><text:soft-page-break/><text:span text:style-name="T10">body; Extirpation removes the solid matter intact or extracts the pieces during the same procedure.</text:span></text:p>
        </text:list-item>
        <text:list-item>
          <text:p text:style-name="P17"><text:span text:style-name="Strong_20_Emphasis"><text:span text:style-name="T11">Restriction</text:span></text:span><text:span text:style-name="T10">: Narrowing the lumen of a tubular body part or orifice; an example is a gastric sleeve procedure or placing a restrictive band around an artery.</text:span></text:p>
        </text:list-item>
        <text:list-item>
          <text:p text:style-name="P17"><text:span text:style-name="Strong_20_Emphasis"><text:span text:style-name="T11">Fusion vs Supplement (Spine)</text:span></text:span><text:span text:style-name="T10">: Fusion joins together solid structures of a joint to render it immobile; Supplement puts in a device that reinforces or stabilizes a body part without fusing the joint.</text:span></text:p>
        </text:list-item>
        <text:list-item>
          <text:p text:style-name="P17"><text:span text:style-name="Strong_20_Emphasis"><text:span text:style-name="T11">Heart Valve Replacement Root Operation</text:span></text:span><text:span text:style-name="T10">: </text:span><text:span text:style-name="Strong_20_Emphasis"><text:span text:style-name="T11">Replacement</text:span></text:span><text:span text:style-name="T10"> (putting in a biological or synthetic device that takes the place of all or a portion of a body part).</text:span></text:p>
        </text:list-item>
        <text:list-item>
          <text:p text:style-name="P17"><text:span text:style-name="Strong_20_Emphasis"><text:span text:style-name="T11">Exploratory Laparotomy (No Treatment)</text:span></text:span><text:span text:style-name="T10">: Code the root operation </text:span><text:span text:style-name="Strong_20_Emphasis"><text:span text:style-name="T11">Inspection</text:span></text:span><text:span text:style-name="T10"> for the body cavity via an open approach.</text:span></text:p>
        </text:list-item>
        <text:list-item>
          <text:p text:style-name="P17"><text:span text:style-name="Strong_20_Emphasis"><text:span text:style-name="T11">Drainage vs Bypass</text:span></text:span><text:span text:style-name="T10">: Drainage is taking or letting out fluids or gases from a body part; Bypass is altering the route of passage of the contents of a tubular body part.</text:span></text:p>
        </text:list-item>
        <text:list-item>
          <text:p text:style-name="P17"><text:span text:style-name="Strong_20_Emphasis"><text:span text:style-name="T11">Hysterectomy + BSO Code Count</text:span></text:span><text:span text:style-name="T10">: Three codes: one for the total uterus (Resection), one for the bilateral ovaries (Resection), and one for the bilateral fallopian tubes (Resection).</text:span></text:p>
        </text:list-item>
        <text:list-item>
          <text:p text:style-name="P17"><text:span text:style-name="Strong_20_Emphasis"><text:span text:style-name="T11">PTCA Without Stent</text:span></text:span><text:span text:style-name="T10">: Root operation </text:span><text:span text:style-name="Strong_20_Emphasis"><text:span text:style-name="T11">Dilation</text:span></text:span><text:span text:style-name="T10"> (expanding the lumen of a tubular body part).</text:span></text:p>
        </text:list-item>
        <text:list-item>
          <text:p text:style-name="P17"><text:span text:style-name="Strong_20_Emphasis"><text:span text:style-name="T11">PTCA With Stent</text:span></text:span><text:span text:style-name="T10">: Root operation </text:span><text:span text:style-name="Strong_20_Emphasis"><text:span text:style-name="T11">Dilation</text:span></text:span><text:span text:style-name="T10">, using a device character that specifies an intraluminal device (e.g., drug-eluting stent).</text:span></text:p>
        </text:list-item>
        <text:list-item>
          <text:p text:style-name="P17"><text:span text:style-name="Strong_20_Emphasis"><text:span text:style-name="T11">Laparoscopic Converted to Open</text:span></text:span><text:span text:style-name="T10">: Code the definitive open procedure under its respective root operation with an "Open" approach, and code a separate diagnostic code for the laparoscopic </text:span><text:span text:style-name="Strong_20_Emphasis"><text:span text:style-name="T11">Inspection</text:span></text:span><text:span text:style-name="T10">.</text:span></text:p>
        </text:list-item>
        <text:list-item>
          <text:p text:style-name="P17"><text:span text:style-name="Strong_20_Emphasis"><text:span text:style-name="T11">Via Natural Endoscopic vs Percutaneous Endoscopic</text:span></text:span><text:span text:style-name="T10">: Via Natural enters through an existing body opening (e.g., mouth to stomach); Percutaneous Endoscopic cuts through skin/layers to insert an endoscope into an internal cavity.</text:span></text:p>
        </text:list-item>
        <text:list-item>
          <text:p text:style-name="P17"><text:span text:style-name="Strong_20_Emphasis"><text:span text:style-name="T11">Biopsy Followed by Resection</text:span></text:span><text:span text:style-name="T10">: Code both procedures: code the biopsy using root operation </text:span><text:span text:style-name="Strong_20_Emphasis"><text:span text:style-name="T11">Excision</text:span></text:span><text:span text:style-name="T10"> (with qualifier "Diagnostic"), and code the definitive treatment using root operation </text:span><text:span text:style-name="Strong_20_Emphasis"><text:span text:style-name="T11">Resection</text:span></text:span><text:span text:style-name="T10">.</text:span></text:p>
        </text:list-item>
        <text:list-item>
          <text:p text:style-name="P17"><text:span text:style-name="Strong_20_Emphasis"><text:span text:style-name="T11">Non-Excisional Debridement</text:span></text:span><text:span text:style-name="T10">: Root operation </text:span><text:span text:style-name="Strong_20_Emphasis"><text:span text:style-name="T11">Extraction</text:span></text:span><text:span text:style-name="T10"> (for scraping or stripping away devitalised tissue). Excisional debridement requires root operation </text:span><text:span text:style-name="Strong_20_Emphasis"><text:span text:style-name="T11">Excision</text:span></text:span><text:span text:style-name="T10">.</text:span></text:p>
        </text:list-item>
        <text:list-item>
          <text:p text:style-name="P17"><text:span text:style-name="Strong_20_Emphasis"><text:span text:style-name="T11">Skin Graft Replacement vs Supplement</text:span></text:span><text:span text:style-name="T10">: </text:span><text:span text:style-name="Strong_20_Emphasis"><text:span text:style-name="T11">Replacement</text:span></text:span><text:span text:style-name="T10"> is used if the native skin is completely removed and substituted; </text:span><text:span text:style-name="Strong_20_Emphasis"><text:span text:style-name="T11">Supplement</text:span></text:span><text:span text:style-name="T10"> is used if the graft is layered over existing tissue to reinforce it.</text:span></text:p>
        </text:list-item>
        <text:list-item>
          <text:p text:style-name="P17"><text:span text:style-name="Strong_20_Emphasis"><text:span text:style-name="T11">Foreign Body Removal from Muscle</text:span></text:span><text:span text:style-name="T10">: Root operation </text:span><text:span text:style-name="Strong_20_Emphasis"><text:span text:style-name="T11">Extirpation</text:span></text:span><text:span text:style-name="T10"> (taking out solid foreign matter from a body part).</text:span></text:p>
        </text:list-item>
        <text:list-item>
          <text:p text:style-name="P17"><text:span text:style-name="Strong_20_Emphasis"><text:span text:style-name="T11">48-Hour Mechanical Ventilation</text:span></text:span><text:span text:style-name="T10">: Section </text:span><text:span text:style-name="Strong_20_Emphasis"><text:span text:style-name="T11">5 (Extracorporeal Assistance and Performance)</text:span></text:span><text:span text:style-name="T10">, Root Operation </text:span><text:span text:style-name="Strong_20_Emphasis"><text:span text:style-name="T11">Performance</text:span></text:span><text:span text:style-name="T10"> (Duration character: "24-96 Consecutive Hours").</text:span></text:p>
        </text:list-item>
        <text:list-item>
          <text:p text:style-name="P17"><text:span text:style-name="Strong_20_Emphasis"><text:span text:style-name="T11">Chest Tube Placement</text:span></text:span><text:span text:style-name="T10">: Root operation </text:span><text:span text:style-name="Strong_20_Emphasis"><text:span text:style-name="T11">Drainage</text:span></text:span><text:span text:style-name="T10"> with a device character indicating a drainage device.</text:span></text:p>
        </text:list-item>
      </text:list>
      <text:p text:style-name="P26"/>
      <text:p text:style-name="P25">Section 3: DRG Logic, MCC, &amp; CC Impact</text:p>
      <text:list xml:id="list4474371506584192951" text:style-name="L9">
        <text:list-item>
          <text:p text:style-name="P18"><text:span text:style-name="Strong_20_Emphasis"><text:span text:style-name="T11">MS-DRG vs APR-DRG</text:span></text:span><text:span text:style-name="T10">: MS-DRG (Medicare) categorises by a single primary MCC/CC to determine a flat reimbursement tier; APR-DRG (All-Patient Refined) assigns two separate scores (1 to 4) for Severity of Illness (SOI) and Risk of Mortality (ROM).</text:span></text:p>
        </text:list-item>
        <text:list-item>
          <text:p text:style-name="P18"><text:span text:style-name="Strong_20_Emphasis"><text:span text:style-name="T11">MCC Impact</text:span></text:span><text:span text:style-name="T10">: It shifts the admission from a "Without CC/MCC" or "With CC" tier to the highest-paying "With MCC" tier, increasing the hospital's relative weight and payment.</text:span></text:p>
        </text:list-item>
        <text:list-item>
          <text:p text:style-name="P23"><text:span text:style-name="Strong_20_Emphasis"><text:span text:style-name="T11">Three MCC Examples</text:span></text:span><text:span text:style-name="T10">: Acute Respiratory Failure (</text:span><text:span text:style-name="Source_20_Text"><text:span text:style-name="T10">J96.00</text:span></text:span><text:span text:style-name="T10">), Septic Shock (</text:span><text:span text:style-name="Source_20_Text"><text:span text:style-name="T10">R65.21</text:span></text:span><text:span text:style-name="T10">), Stage 4 Pressure Ulcer (</text:span><text:span text:style-name="Source_20_Text"><text:span text:style-name="T10">L89.-</text:span></text:span><text:span text:style-name="T10">).</text:span></text:p>
        </text:list-item>
        <text:list-item>
          <text:p text:style-name="P23"><text:span text:style-name="Strong_20_Emphasis"><text:span text:style-name="T11">Three CC Examples</text:span></text:span><text:span text:style-name="T10">: Acute Blood Loss Anemia (</text:span><text:span text:style-name="Source_20_Text"><text:span text:style-name="T10">D62</text:span></text:span><text:span text:style-name="T10">), Dehydration (</text:span><text:span text:style-name="Source_20_Text"><text:span text:style-name="T10">E86.0</text:span></text:span><text:span text:style-name="T10">), Stage 3 Pressure Ulcer (</text:span><text:span text:style-name="Source_20_Text"><text:span text:style-name="T10">L89.-</text:span></text:span><text:span text:style-name="T10">).</text:span></text:p>
        </text:list-item>
        <text:list-item>
          <text:p text:style-name="P18"><text:span text:style-name="Strong_20_Emphasis"><text:span text:style-name="T11">Top-Overlapping Logic</text:span></text:span><text:span text:style-name="T10">: Surgical DRG assignment takes precedence; if an eligible operating room procedure is performed, the case groups into a surgical DRG regardless of the medical principal diagnosis.</text:span></text:p>
        </text:list-item>
        <text:list-item>
          <text:p text:style-name="P18"><text:span text:style-name="Strong_20_Emphasis"><text:span text:style-name="T11">Non-O.R. Procedure Impact</text:span></text:span><text:span text:style-name="T10">: Certain non-operating room procedures (like mechanical ventilation &gt;24 hours or a percutaneous heart catheterization) can upgrade a medical case to a higher-weighted DRG tier.</text:span></text:p>
        </text:list-item>
        <text:list-item>
          <text:p text:style-name="P18"><text:span text:style-name="Strong_20_Emphasis"><text:span text:style-name="T11">Unrelated O.R. Procedure DRG</text:span></text:span><text:span text:style-name="T10">: Triggered when a patient undergoes a major surgical procedure in the operating room that is completely unrelated to the assigned principal diagnosis.</text:span></text:p>
        </text:list-item>
        <text:list-item>
          <text:p text:style-name="P18"><text:span text:style-name="Strong_20_Emphasis"><text:span text:style-name="T11">Pancreatitis + Acute Respiratory Failure</text:span></text:span><text:span text:style-name="T10">: It shifts the acute pancreatitis medical DRG case directly to the highest tier ("With MCC"), multiplying the baseline reimbursement.</text:span></text:p>
        </text:list-item>
        <text:list-item>
          <text:p text:style-name="P18"><text:soft-page-break/><text:span text:style-name="Strong_20_Emphasis"><text:span text:style-name="T11">Multiple CCs Weight Impact</text:span></text:span><text:span text:style-name="T10">: No. In the MS-DRG system, a case only requires one CC to move to the middle tier; additional CCs do not stack or increase the weight further.</text:span></text:p>
        </text:list-item>
        <text:list-item>
          <text:p text:style-name="P18"><text:span text:style-name="Strong_20_Emphasis"><text:span text:style-name="T11">Pressure Ulcers DRG Impact</text:span></text:span><text:span text:style-name="T10">: Stages 3 and 4 act as complications (Stage 3 is a CC, Stage 4 is an MCC), whereas Stages 1 and 2 are non-complications and do not shift the DRG.</text:span></text:p>
        </text:list-item>
        <text:list-item>
          <text:p text:style-name="P18"><text:span text:style-name="Strong_20_Emphasis"><text:span text:style-name="T11">Morbid Obesity vs Simple Obesity</text:span></text:span><text:span text:style-name="T10">: Morbid obesity with a documented BMI </text:span></text:p>
          <text:p text:style-name="P13"><draw:frame draw:style-name="fr1" draw:name="graphics1" text:anchor-type="as-char" svg:width="0.3752in" svg:height="0.25in" draw:z-index="0"><draw:image xlink:href="data:image/png;base64,iVBORw0KGgoAAAANSUhEUgAAACQAAAAYCAYAAACSuF9OAAAAPklEQVR4AezSsREAMAjEMI79h2YEtxRK+01OeOfZ86E6CCFCJVC7hgiVQO0aIlQCtWuIUAnUriFCJVD7u4YOAAD//4vPw/wAAAAGSURBVAMAYX8AMTuL1F8AAAAASUVORK5CYII=" xlink:type="simple" xlink:show="embed" xlink:actuate="onLoad"/></draw:frame></text:p>
          <text:p text:style-name="P13">≥<text:span text:style-name="T1">40is greater than or equal to 40</text:span></text:p>
          <text:p text:style-name="P5">≥<text:span text:style-name="T1">40</text:span></text:p>
          <text:p text:style-name="P6">acts as a CC; simple obesity or lower BMIs carry no CC weight.</text:p>
        </text:list-item>
        <text:list-item>
          <text:p text:style-name="P18"><text:span text:style-name="Strong_20_Emphasis"><text:span text:style-name="T11">Pancytopenia in Oncology</text:span></text:span><text:span text:style-name="T10">: It acts as an MCC or CC (depending on the exact type/cause), upgrading the diagnostic group weight for complications during cancer care.</text:span></text:p>
        </text:list-item>
        <text:list-item>
          <text:p text:style-name="P18"><text:span text:style-name="Strong_20_Emphasis"><text:span text:style-name="T11">Acute Delirium in Orthopedics</text:span></text:span><text:span text:style-name="T10">: It maps as a CC, raising the orthopedic surgery or medical admission to the "With CC" tier.</text:span></text:p>
        </text:list-item>
        <text:list-item>
          <text:p text:style-name="P18"><text:span text:style-name="Strong_20_Emphasis"><text:span text:style-name="T11">AMA Discharge Impact</text:span></text:span><text:span text:style-name="T10">: It changes the discharge status code, which can trigger a per-diem payment reduction if the transfer or discharge falls below the geometric mean length of stay for that DRG.</text:span></text:p>
        </text:list-item>
        <text:list-item>
          <text:p text:style-name="P18"><text:span text:style-name="Strong_20_Emphasis"><text:span text:style-name="T11">CC/MCC Exclusions</text:span></text:span><text:span text:style-name="T10">: The grouper contains an exclusion list; if a secondary diagnosis is inherently part of the principal diagnosis (e.g., baseline chronic respiratory failure with acute respiratory failure), it is excluded from acting as an MCC/CC.</text:span></text:p>
        </text:list-item>
        <text:list-item>
          <text:p text:style-name="P18"><text:span text:style-name="Strong_20_Emphasis"><text:span text:style-name="T11">COPD Exacerbation Exclusion</text:span></text:span><text:span text:style-name="T10">: Because the exacerbation already captures the acute pulmonary decompensation, the underlying chronic airway disease is clinically redundant and excluded from adding CC weight.</text:span></text:p>
        </text:list-item>
        <text:list-item>
          <text:p text:style-name="P18"><text:span text:style-name="Strong_20_Emphasis"><text:span text:style-name="T11">Aspiration Pneumonia in Stroke</text:span></text:span><text:span text:style-name="T10">: It acts as an MCC, moving the acute stroke admission into the highest-paying MS-DRG tier.</text:span></text:p>
        </text:list-item>
        <text:list-item>
          <text:p text:style-name="P18"><text:span text:style-name="Strong_20_Emphasis"><text:span text:style-name="T11">HCC vs CC/MCC</text:span></text:span><text:span text:style-name="T10">: CC/MCC dictates immediate financial reimbursement for the current inpatient stay; HCCs capture overall patient complexity used for long-term risk-adjustment models.</text:span></text:p>
        </text:list-item>
        <text:list-item>
          <text:p text:style-name="P18"><text:span text:style-name="Strong_20_Emphasis"><text:span text:style-name="T11">Intracranial Hemorrhage in Craniotomy</text:span></text:span><text:span text:style-name="T10">: It groups the surgery into a specific high-severity nervous system surgical DRG designated for major intracranial trauma or hemorrhage.</text:span></text:p>
        </text:list-item>
        <text:list-item>
          <text:p text:style-name="P18"><text:span text:style-name="Strong_20_Emphasis"><text:span text:style-name="T11">DRG Creep Risk</text:span></text:span><text:span text:style-name="T10">: Upcoding unsupported diagnoses to maximize revenue invites severe financial penalties, systematic audits, and allegations of healthcare fraud under the False Claims Act.</text:span></text:p>
        </text:list-item>
      </text:list>
      <text:p text:style-name="P26"/>
      <text:p text:style-name="P25">Section 4: Present on Admission (POA) &amp; Hospital-Acquired Conditions (HAC)</text:p>
      <text:list xml:id="list8145046098147366300" text:style-name="L10">
        <text:list-item>
          <text:p text:style-name="P19"><text:span text:style-name="Strong_20_Emphasis"><text:span text:style-name="T11">Four POA Indicators</text:span></text:span><text:span text:style-name="T10">:</text:span></text:p>
          <text:list>
            <text:list-item>
              <text:p text:style-name="P19"><text:span text:style-name="Strong_20_Emphasis"><text:span text:style-name="T11">Y</text:span></text:span><text:span text:style-name="T10">: Present at the time of inpatient admission.</text:span></text:p>
            </text:list-item>
            <text:list-item>
              <text:p text:style-name="P19"><text:span text:style-name="Strong_20_Emphasis"><text:span text:style-name="T11">N</text:span></text:span><text:span text:style-name="T10">: Not present at the time of inpatient admission.</text:span></text:p>
            </text:list-item>
            <text:list-item>
              <text:p text:style-name="P19"><text:span text:style-name="Strong_20_Emphasis"><text:span text:style-name="T11">U</text:span></text:span><text:span text:style-name="T10">: Documentation is insufficient to determine if present.</text:span></text:p>
            </text:list-item>
            <text:list-item>
              <text:p text:style-name="P19"><text:span text:style-name="Strong_20_Emphasis"><text:span text:style-name="T11">W</text:span></text:span><text:span text:style-name="T10">: Clinically undetermined if present.</text:span></text:p>
            </text:list-item>
          </text:list>
        </text:list-item>
        <text:list-item>
          <text:p text:style-name="P19"><text:span text:style-name="Strong_20_Emphasis"><text:span text:style-name="T11">Conflicting Documentation</text:span></text:span><text:span text:style-name="T10">: Query the attending provider to clarify whether the condition was present or absent at the exact moment of admission.</text:span></text:p>
        </text:list-item>
        <text:list-item>
          <text:p text:style-name="P19"><text:span text:style-name="Strong_20_Emphasis"><text:span text:style-name="T11">POA and HAC Relationship</text:span></text:span><text:span text:style-name="T10">: If a condition listed on the CMS HAC list is designated with a POA indicator of "N" (No), it is flagged as hospital-acquired.</text:span></text:p>
        </text:list-item>
        <text:list-item>
          <text:p text:style-name="P19"><text:span text:style-name="Strong_20_Emphasis"><text:span text:style-name="T11">CAUTI on Day 3</text:span></text:span><text:span text:style-name="T10">: POA indicator </text:span><text:span text:style-name="Strong_20_Emphasis"><text:span text:style-name="T11">N</text:span></text:span><text:span text:style-name="T10"> (Not present at the time of admission).</text:span></text:p>
        </text:list-item>
        <text:list-item>
          <text:p text:style-name="P19"><text:span text:style-name="Strong_20_Emphasis"><text:span text:style-name="T11">HAC Reimbursement Impact</text:span></text:span><text:span text:style-name="T10">: CMS strips the CC/MCC payment weight from that specific condition, forcing the entire case to reimburse at a lower-paying DRG tier if no other valid CC/MCC exists.</text:span></text:p>
        </text:list-item>
        <text:list-item>
          <text:p text:style-name="P19"><text:span text:style-name="Strong_20_Emphasis"><text:span text:style-name="T11">Worsening Pressure Ulcer</text:span></text:span><text:span text:style-name="T10">: Assign two codes: code the stage present at admission with POA </text:span><text:span text:style-name="Strong_20_Emphasis"><text:span text:style-name="T11">Y</text:span></text:span><text:span text:style-name="T10">, and code the highest worsened stage with POA </text:span><text:span text:style-name="Strong_20_Emphasis"><text:span text:style-name="T11">N</text:span></text:span><text:span text:style-name="T10">.</text:span></text:p>
        </text:list-item>
        <text:list-item>
          <text:p text:style-name="P19"><text:span text:style-name="Strong_20_Emphasis"><text:span text:style-name="T11">In-Hospital Fall External Cause</text:span></text:span><text:span text:style-name="T10">: POA indicator </text:span><text:span text:style-name="Strong_20_Emphasis"><text:span text:style-name="T11">N</text:span></text:span><text:span text:style-name="T10">.</text:span></text:p>
        </text:list-item>
        <text:list-item>
          <text:p text:style-name="P19"><text:span text:style-name="Strong_20_Emphasis"><text:span text:style-name="T11">Observation Stay to Inpatient Admission</text:span></text:span><text:span text:style-name="T10">: Conditions present at the start of the outpatient observation stay are assigned a POA indicator of </text:span><text:span text:style-name="Strong_20_Emphasis"><text:span text:style-name="T11">Y</text:span></text:span><text:span text:style-name="T10">.</text:span></text:p>
        </text:list-item>
        <text:list-item>
          <text:p text:style-name="P19"><text:span text:style-name="Strong_20_Emphasis"><text:span text:style-name="T11">Congenital Anomalies</text:span></text:span><text:span text:style-name="T10">: Always assign POA indicator </text:span><text:span text:style-name="Strong_20_Emphasis"><text:span text:style-name="T11">Y</text:span></text:span><text:span text:style-name="T10">, as congenital conditions are inherently present at birth.</text:span></text:p>
        </text:list-item>
        <text:list-item>
          <text:p text:style-name="P19"><text:soft-page-break/><text:span text:style-name="Strong_20_Emphasis"><text:span text:style-name="T11">Suspected/Probable at Discharge</text:span></text:span><text:span text:style-name="T10">: Assign POA indicator </text:span><text:span text:style-name="Strong_20_Emphasis"><text:span text:style-name="T11">Y</text:span></text:span><text:span text:style-name="T10"> if the condition was suspected based on signs and symptoms present upon admission.</text:span></text:p>
        </text:list-item>
        <text:list-item>
          <text:p text:style-name="P19"><text:span text:style-name="Strong_20_Emphasis"><text:span text:style-name="T11">Foreign Body From Outside Facility</text:span></text:span><text:span text:style-name="T10">: POA indicator </text:span><text:span text:style-name="Strong_20_Emphasis"><text:span text:style-name="T11">Y</text:span></text:span><text:span text:style-name="T10">, because the condition existed before entry into your hospital.</text:span></text:p>
        </text:list-item>
        <text:list-item>
          <text:p text:style-name="P19"><text:span text:style-name="Strong_20_Emphasis"><text:span text:style-name="T11">ER Fall Prior to Admission</text:span></text:span><text:span text:style-name="T10">: POA indicator </text:span><text:span text:style-name="Strong_20_Emphasis"><text:span text:style-name="T11">Y</text:span></text:span><text:span text:style-name="T10">, because the fracture occurred before the official inpatient admission order was written.</text:span></text:p>
        </text:list-item>
        <text:list-item>
          <text:p text:style-name="P19"><text:span text:style-name="Strong_20_Emphasis"><text:span text:style-name="T11">Three HAC Conditions</text:span></text:span><text:span text:style-name="T10">: Stage 3/4 Pressure Ulcers, Catheter-Associated Urinary Tract Infections (CAUTI), and Bloodstream infections from central venous catheters (CLABSI).</text:span></text:p>
        </text:list-item>
        <text:list-item>
          <text:p text:style-name="P19"><text:span text:style-name="Strong_20_Emphasis"><text:span text:style-name="T11">Silent Documentation</text:span></text:span><text:span text:style-name="T10">: Query the provider for clarification; if no response can be obtained, assign POA indicator </text:span><text:span text:style-name="Strong_20_Emphasis"><text:span text:style-name="T11">U</text:span></text:span><text:span text:style-name="T10"> (Unknown).</text:span></text:p>
        </text:list-item>
        <text:list-item>
          <text:p text:style-name="P19"><text:span text:style-name="Strong_20_Emphasis"><text:span text:style-name="T11">POA "U" Impact</text:span></text:span><text:span text:style-name="T10">: For HAC purposes, CMS treats a "U" indicator as an "N" (No), meaning the hospital is penalized if it is a hospital-acquired condition.</text:span></text:p>
        </text:list-item>
      </text:list>
      <text:p text:style-name="P26"/>
      <text:p text:style-name="P25">Section 5: CDI Collaboration &amp; Physician Queries</text:p>
      <text:list xml:id="list9131738352752827561" text:style-name="L11">
        <text:list-item>
          <text:p text:style-name="P20"><text:span text:style-name="Strong_20_Emphasis"><text:span text:style-name="T11">Compliant Query Criteria</text:span></text:span><text:span text:style-name="T10">: Must be written with neutral language, include patient-specific clinical indicators, offer multiple choices (including "other" and "clinically undetermined"), and never mention financial or DRG impact.</text:span></text:p>
        </text:list-item>
        <text:list-item>
          <text:p text:style-name="P20"><text:span text:style-name="Strong_20_Emphasis"><text:span text:style-name="T11">Linkage Query Rule</text:span></text:span><text:span text:style-name="T10">: Required when a cause-and-effect relationship between two conditions changes code sequencing or codes them as a single manifestation (e.g., linking chronic kidney disease to diabetes).</text:span></text:p>
        </text:list-item>
        <text:list-item>
          <text:p text:style-name="P20"><text:span text:style-name="Strong_20_Emphasis"><text:span text:style-name="T11">Creatinine 2.4 Scenario</text:span></text:span><text:span text:style-name="T10">: Formulate a compliant query presenting the baseline vs. current creatinine levels and ask the physician to clarify if an Acute Kidney Injury (AKI) is present.</text:span></text:p>
        </text:list-item>
        <text:list-item>
          <text:p text:style-name="P20"><text:span text:style-name="Strong_20_Emphasis"><text:span text:style-name="T11">Urosepsis vs UTI</text:span></text:span><text:span text:style-name="T10">: Query the attending provider to clarify if the patient has localized a urinary tract infection or systemic "Sepsis secondary to UTI," noting that "urosepsis" has no distinct code in ICD-10-CM.</text:span></text:p>
        </text:list-item>
        <text:list-item>
          <text:p text:style-name="P20"><text:span text:style-name="Strong_20_Emphasis"><text:span text:style-name="T11">Acute Respiratory Failure Indicators</text:span></text:span><text:span text:style-name="T10">: Look for pO2 &lt; 60, pCO2 &gt; 50, pH &lt; 7.35 on room air arterial blood gases, tachypnea, cyanosis, and the initiation of aggressive oxygen therapy (BIPAP/High-flow nasal cannula).</text:span></text:p>
        </text:list-item>
        <text:list-item>
          <text:p text:style-name="P20"><text:span text:style-name="Strong_20_Emphasis"><text:span text:style-name="T11">Heart Failure Query Specifics</text:span></text:span><text:span text:style-name="T10">: Query when the documentation states "heart failure" but the echocardiogram shows an ejection fraction &lt; 40% or clinical notes indicate acute decompensation on chronic baseline management.</text:span></text:p>
        </text:list-item>
        <text:list-item>
          <text:p text:style-name="P20"><text:span text:style-name="Strong_20_Emphasis"><text:span text:style-name="T11">Post-Discharge Query Response</text:span></text:span><text:span text:style-name="T10">: Yes, provided the response is documented directly in the legal medical record and signed by the provider within the facility's allowed chart-completion timeframe.</text:span></text:p>
        </text:list-item>
        <text:list-item>
          <text:p text:style-name="P20"><text:span text:style-name="Strong_20_Emphasis"><text:span text:style-name="T11">"Possible" or "Probable" Response</text:span></text:span><text:span text:style-name="T10">: Code it as a confirmed diagnosis; inpatient coding guidelines explicitly permit coding uncertain diagnoses if they remain documented as such at discharge.</text:span></text:p>
        </text:list-item>
        <text:list-item>
          <text:p text:style-name="P20"><text:span text:style-name="Strong_20_Emphasis"><text:span text:style-name="T11">Leading Query Definition</text:span></text:span><text:span text:style-name="T10">: A query that guides the physician toward a specific diagnosis by omitting alternative choices or structuring the question to invite a single preferred response.</text:span></text:p>
        </text:list-item>
        <text:list-item>
          <text:p text:style-name="P20"><text:span text:style-name="Strong_20_Emphasis"><text:span text:style-name="T11">Physician Rejection Escalation</text:span></text:span><text:span text:style-name="T10">: Elevate the pattern to your Coding Manager or CDI Physician Advisor to initiate peer-to-peer education on documentation compliance.</text:span></text:p>
        </text:list-item>
        <text:list-item>
          <text:p text:style-name="P20"><text:span text:style-name="Strong_20_Emphasis"><text:span text:style-name="T11">Malnutrition Query Indicators</text:span></text:span><text:span text:style-name="T10">: Look for severe involuntary weight loss, muscle wasting, orbital fat loss, chronically low prealbumin/albumin, and a documented history of minimal oral intake.</text:span></text:p>
        </text:list-item>
        <text:list-item>
          <text:p text:style-name="P20"><text:span text:style-name="Strong_20_Emphasis"><text:span text:style-name="T11">AMS vs Encephalopathy</text:span></text:span><text:span text:style-name="T10">: Query for encephalopathy when altered mental status fails to resolve with basic hydration or treating the local infection, indicating systemic metabolic brain dysfunction.</text:span></text:p>
        </text:list-item>
        <text:list-item>
          <text:p text:style-name="P20"><text:span text:style-name="Strong_20_Emphasis"><text:span text:style-name="T11">ID Specialist vs Attending Conflict</text:span></text:span><text:span text:style-name="T10">: Query the attending physician to formally resolve the conflicting diagnoses within the body of the medical record before final billing.</text:span></text:p>
        </text:list-item>
        <text:list-item>
          <text:p text:style-name="P20"><text:span text:style-name="Strong_20_Emphasis"><text:span text:style-name="T11">Troponin / Chest Pain Query</text:span></text:span><text:span text:style-name="T10">: List the sequential troponin values, EKG findings, and treatments; ask the provider to clarify the underlying cardiac condition (e.g., myocardial infarction, demand ischemia, or non-cardiac chest pain).</text:span></text:p>
        </text:list-item>
        <text:list-item>
          <text:p text:style-name="P20"><text:span text:style-name="Strong_20_Emphasis"><text:span text:style-name="T11">Shock Specificity Importance</text:span></text:span><text:span text:style-name="T10">: Different types of shock map to distinct clinical codes and heavily influence the MS-DRG assignment by validating the severity of the primary illness.</text:span></text:p>
        </text:list-item>
      </text:list>
      <text:p text:style-name="P26"/>
      <text:p text:style-name="P25"><text:soft-page-break/>Section 6: Regulatory Compliance, Audits, &amp; Case Studies</text:p>
      <text:list xml:id="list6636326823593951328" text:style-name="L12">
        <text:list-item>
          <text:p text:style-name="P21"><text:span text:style-name="Strong_20_Emphasis"><text:span text:style-name="T11">RAC Role</text:span></text:span><text:span text:style-name="T10">: Conduct retrospective reviews of paid inpatient claims to identify overpayments, focus heavily on checking clinical validity for MCCs, and flag improper principal diagnosis sequencing.</text:span></text:p>
        </text:list-item>
        <text:list-item>
          <text:p text:style-name="P21"><text:span text:style-name="Strong_20_Emphasis"><text:span text:style-name="T11">Two-Midnight Rule</text:span></text:span><text:span text:style-name="T10">: Specifies that an inpatient admission is appropriate if the admitting physician expects the patient to require hospital care spanning at least two midnights; documentation must justify this expectation.</text:span></text:p>
        </text:list-item>
        <text:list-item>
          <text:p text:style-name="P21"><text:span text:style-name="Strong_20_Emphasis"><text:span text:style-name="T11">Clinical Criteria Missing</text:span></text:span><text:span text:style-name="T10">: Do not code the high-paying diagnosis based on a mere word match; query the provider for clinical validation, or drop the code if the documentation fails to support the clinical definition.</text:span></text:p>
        </text:list-item>
        <text:list-item>
          <text:p text:style-name="P21"><text:span text:style-name="Strong_20_Emphasis"><text:span text:style-name="T11">Systemic PCS Coding Error</text:span></text:span><text:span text:style-name="T10">: Pause affected billing streams, conduct formal educational sessions for the coding staff, and initiate an immediate lookback audit to correct and rebill any inaccurate claims.</text:span></text:p>
        </text:list-item>
        <text:list-item>
          <text:p text:style-name="P21"><text:span text:style-name="Strong_20_Emphasis"><text:span text:style-name="T11">Unbundling</text:span></text:span><text:span text:style-name="T10">: The practice of coding multiple separate component parts of a procedure using individual PCS codes when a single comprehensive root operation code covers the entire surgical episode.</text:span></text:p>
        </text:list-item>
        <text:list-item>
          <text:p text:style-name="P24"><text:span text:style-name="Strong_20_Emphasis"><text:span text:style-name="T11">Case Study (Urosepsis)</text:span></text:span><text:span text:style-name="T10">: Query the provider to clarify if the patient has "Sepsis due to UTI." If confirmed, sequence Sepsis (</text:span><text:span text:style-name="Source_20_Text"><text:span text:style-name="T10">A41.9</text:span></text:span><text:span text:style-name="T10">) as principal, followed by the localized UTI code (</text:span><text:span text:style-name="Source_20_Text"><text:span text:style-name="T10">N39.0</text:span></text:span><text:span text:style-name="T10">) and severe sepsis criteria if met.</text:span></text:p>
        </text:list-item>
        <text:list-item>
          <text:p text:style-name="P21"><text:span text:style-name="Strong_20_Emphasis"><text:span text:style-name="T11">Case Study (Perforated Gallbladder)</text:span></text:span><text:span text:style-name="T10">: Code the primary cholecystectomy using root operation </text:span><text:span text:style-name="Strong_20_Emphasis"><text:span text:style-name="T11">Resection</text:span></text:span><text:span text:style-name="T10">. If an extensive, distinct therapeutic washout of the peritoneal cavity is documented, code a secondary procedure under the root operation </text:span><text:span text:style-name="Strong_20_Emphasis"><text:span text:style-name="T11">Irrigation</text:span></text:span><text:span text:style-name="T10">.</text:span></text:p>
        </text:list-item>
        <text:list-item>
          <text:p text:style-name="P24"><text:span text:style-name="Strong_20_Emphasis"><text:span text:style-name="T11">Case Study (Transplant Kidney Failure)</text:span></text:span><text:span text:style-name="T10">: Code the transplant complication first (</text:span><text:span text:style-name="Source_20_Text"><text:span text:style-name="T10">T86.12</text:span></text:span><text:span text:style-name="T10">, Kidney transplant failure), followed by the specific code for Acute Kidney Injury (</text:span><text:span text:style-name="Source_20_Text"><text:span text:style-name="T10">N17.9</text:span></text:span><text:span text:style-name="T10">).</text:span></text:p>
        </text:list-item>
        <text:list-item>
          <text:p text:style-name="P21"><text:span text:style-name="Strong_20_Emphasis"><text:span text:style-name="T11">UHDDS Defense Strategy</text:span></text:span><text:span text:style-name="T10">: Present documentation proving that the selected principal diagnosis was the definitive condition established after study to be chiefly responsible for occasioning the inpatient admission.</text:span></text:p>
        </text:list-item>
        <text:list-item>
          <text:p text:style-name="P21"><text:span text:style-name="Strong_20_Emphasis"><text:span text:style-name="T11">Staying Updated</text:span></text:span><text:span text:style-name="T10">: Review the Federal Register for the CMS IPPS Final Rule published every August, and complete annual mandatory CEU courses tracking the official ICD-10-CM/PCS Coordination and Maintenance Committee updates effective October 1st.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" svg:font-family="'Google Sans', Arial, sans-serif"/>
    <style:font-face style:name="OpenSymbol" svg:font-family="OpenSymbol"/>
    <style:font-face style:name="monospace" svg:font-family="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6-04T14:43:35.93</meta:creation-date>
    <dc:date>2026-06-04T14:49:29.32</dc:date>
    <meta:editing-duration>PT5M51S</meta:editing-duration>
    <meta:editing-cycles>4</meta:editing-cycles>
    <meta:generator>OpenOffice/4.1.14$Win32 OpenOffice.org_project/4114m1$Build-9811</meta:generator>
    <meta:document-statistic meta:table-count="0" meta:image-count="1" meta:object-count="0" meta:page-count="8" meta:paragraph-count="222" meta:word-count="4613" meta:character-count="30071"/>
  </office:meta>
</office:document-meta>
</file>