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Arial, sans-serif"/>
    <style:font-face style:name="monospace" svg:font-family="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9">
      <style:paragraph-properties fo:margin-top="0in" fo:margin-bottom="0in" fo:padding="0in" fo:border="none"/>
      <style:text-properties style:text-line-through-style="none" style:font-name="Arial" fo:font-size="10pt" style:text-underline-style="none" style:text-blinking="false" style:font-size-asian="10pt" style:font-size-complex="10pt"/>
    </style:style>
    <style:style style:name="P2" style:family="paragraph" style:parent-style-name="Text_20_body" style:list-style-name="L9">
      <style:paragraph-properties fo:margin-top="0in" fo:margin-bottom="0in" fo:padding="0in" fo:border="none"/>
      <style:text-properties style:text-line-through-style="none" style:font-name="Arial" fo:font-size="10pt" style:text-underline-style="none" fo:font-weight="normal" style:text-blinking="false" style:font-size-asian="10pt" style:font-size-complex="10pt"/>
    </style:style>
    <style:style style:name="P3" style:family="paragraph" style:parent-style-name="Text_20_body" style:list-style-name="L1">
      <style:paragraph-properties fo:margin-left="0in" fo:margin-right="0in" fo:margin-top="0in" fo:margin-bottom="0in" fo:text-indent="0in" style:auto-text-indent="false" fo:padding="0in" fo:border="none"/>
      <style:text-properties style:text-line-through-style="none" style:font-name="Arial" fo:font-size="10pt" style:text-underline-style="none" fo:font-weight="normal" style:text-blinking="false" style:font-size-asian="10pt" style:font-name-complex="Arial" style:font-size-complex="10pt"/>
    </style:style>
    <style:style style:name="P4" style:family="paragraph" style:parent-style-name="Text_20_body" style:list-style-name="L2">
      <style:paragraph-properties fo:margin-left="0in" fo:margin-right="0in" fo:margin-top="0in" fo:margin-bottom="0in" fo:text-indent="0in" style:auto-text-indent="false" fo:padding="0in" fo:border="none"/>
      <style:text-properties style:text-line-through-style="none" style:font-name="Arial" fo:font-size="10pt" style:text-underline-style="none" fo:font-weight="normal" style:text-blinking="false" style:font-size-asian="10pt" style:font-name-complex="Arial" style:font-size-complex="10pt"/>
    </style:style>
    <style:style style:name="P5" style:family="paragraph" style:parent-style-name="Text_20_body" style:list-style-name="L3">
      <style:paragraph-properties fo:margin-left="0in" fo:margin-right="0in" fo:margin-top="0in" fo:margin-bottom="0in" fo:text-indent="0in" style:auto-text-indent="false" fo:padding="0in" fo:border="none"/>
      <style:text-properties style:text-line-through-style="none" style:font-name="Arial" fo:font-size="10pt" style:text-underline-style="none" fo:font-weight="normal" style:text-blinking="false" style:font-size-asian="10pt" style:font-name-complex="Arial" style:font-size-complex="10pt"/>
    </style:style>
    <style:style style:name="P6" style:family="paragraph" style:parent-style-name="Text_20_body" style:list-style-name="L4">
      <style:paragraph-properties fo:margin-left="0in" fo:margin-right="0in" fo:margin-top="0in" fo:margin-bottom="0in" fo:text-indent="0in" style:auto-text-indent="false" fo:padding="0in" fo:border="none"/>
      <style:text-properties style:text-line-through-style="none" style:font-name="Arial" fo:font-size="10pt" style:text-underline-style="none" fo:font-weight="normal" style:text-blinking="false" style:font-size-asian="10pt" style:font-name-complex="Arial" style:font-size-complex="10pt"/>
    </style:style>
    <style:style style:name="P7" style:family="paragraph" style:parent-style-name="Text_20_body" style:list-style-name="L5">
      <style:paragraph-properties fo:margin-left="0in" fo:margin-right="0in" fo:margin-top="0in" fo:margin-bottom="0in" fo:text-indent="0in" style:auto-text-indent="false" fo:padding="0in" fo:border="none"/>
      <style:text-properties style:text-line-through-style="none" style:font-name="Arial" fo:font-size="10pt" style:text-underline-style="none" fo:font-weight="normal" style:text-blinking="false" style:font-size-asian="10pt" style:font-name-complex="Arial" style:font-size-complex="10pt"/>
    </style:style>
    <style:style style:name="P8" style:family="paragraph" style:parent-style-name="Text_20_body" style:list-style-name="L6">
      <style:paragraph-properties fo:margin-left="0in" fo:margin-right="0in" fo:margin-top="0in" fo:margin-bottom="0in" fo:text-indent="0in" style:auto-text-indent="false" fo:padding="0in" fo:border="none"/>
      <style:text-properties style:text-line-through-style="none" style:font-name="Arial" fo:font-size="10pt" style:text-underline-style="none" fo:font-weight="normal" style:text-blinking="false" style:font-size-asian="10pt" style:font-name-complex="Arial" style:font-size-complex="10pt"/>
    </style:style>
    <style:style style:name="P9" style:family="paragraph" style:parent-style-name="Text_20_body" style:list-style-name="L7">
      <style:paragraph-properties fo:margin-left="0in" fo:margin-right="0in" fo:margin-top="0in" fo:margin-bottom="0in" fo:text-indent="0in" style:auto-text-indent="false" fo:padding="0in" fo:border="none"/>
      <style:text-properties style:text-line-through-style="none" style:font-name="Arial" fo:font-size="10pt" style:text-underline-style="none" fo:font-weight="normal" style:text-blinking="false" style:font-size-asian="10pt" style:font-size-complex="10pt"/>
    </style:style>
    <style:style style:name="P10" style:family="paragraph" style:parent-style-name="Text_20_body" style:list-style-name="L9">
      <style:paragraph-properties fo:margin-left="0in" fo:margin-right="0in" fo:margin-top="0in" fo:margin-bottom="0in" fo:text-indent="0in" style:auto-text-indent="false" fo:padding="0in" fo:border="none"/>
      <style:text-properties style:text-line-through-style="none" style:font-name="Arial" fo:font-size="10pt" style:text-underline-style="none" fo:font-weight="normal" style:text-blinking="false" style:font-size-asian="10pt" style:font-size-complex="10pt"/>
    </style:style>
    <style:style style:name="P11" style:family="paragraph" style:parent-style-name="Text_20_body" style:list-style-name="L10">
      <style:paragraph-properties fo:margin-left="0in" fo:margin-right="0in" fo:margin-top="0in" fo:margin-bottom="0in" fo:text-indent="0in" style:auto-text-indent="false" fo:padding="0in" fo:border="none"/>
      <style:text-properties style:text-line-through-style="none" style:font-name="Arial" fo:font-size="10pt" style:text-underline-style="none" fo:font-weight="normal" style:text-blinking="false" style:font-size-asian="10pt" style:font-size-complex="10pt"/>
    </style:style>
    <style:style style:name="P12" style:family="paragraph" style:parent-style-name="Text_20_body" style:list-style-name="L11">
      <style:paragraph-properties fo:margin-left="0in" fo:margin-right="0in" fo:margin-top="0in" fo:margin-bottom="0in" fo:text-indent="0in" style:auto-text-indent="false" fo:padding="0in" fo:border="none"/>
      <style:text-properties style:text-line-through-style="none" style:font-name="Arial" fo:font-size="10pt" style:text-underline-style="none" fo:font-weight="normal" style:text-blinking="false" style:font-size-asian="10pt" style:font-size-complex="10pt"/>
    </style:style>
    <style:style style:name="P13" style:family="paragraph" style:parent-style-name="Text_20_body" style:list-style-name="L12">
      <style:paragraph-properties fo:margin-left="0in" fo:margin-right="0in" fo:margin-top="0in" fo:margin-bottom="0in" fo:text-indent="0in" style:auto-text-indent="false" fo:padding="0in" fo:border="none"/>
      <style:text-properties style:text-line-through-style="none" style:font-name="Arial" fo:font-size="10pt" style:text-underline-style="none" fo:font-weight="normal" style:text-blinking="false" style:font-size-asian="10pt" style:font-size-complex="10pt"/>
    </style:style>
    <style:style style:name="P14" style:family="paragraph" style:parent-style-name="Text_20_body" style:list-style-name="L1">
      <style:paragraph-properties fo:margin-left="0in" fo:margin-right="0in" fo:margin-top="0in" fo:margin-bottom="0in" fo:text-indent="0in" style:auto-text-indent="false" fo:padding="0in" fo:border="none"/>
      <style:text-properties style:text-line-through-style="none" style:font-name="Arial" fo:font-size="10pt" style:text-underline-style="none" style:text-blinking="false" style:font-size-asian="10pt" style:font-name-complex="Arial" style:font-size-complex="10pt"/>
    </style:style>
    <style:style style:name="P15" style:family="paragraph" style:parent-style-name="Text_20_body" style:list-style-name="L9">
      <style:paragraph-properties fo:margin-left="0in" fo:margin-right="0in" fo:margin-top="0in" fo:margin-bottom="0in" fo:text-indent="0in" style:auto-text-indent="false" fo:padding="0in" fo:border="none"/>
      <style:text-properties style:text-line-through-style="none" style:font-name="Arial" fo:font-size="10pt" style:text-underline-style="none" style:text-blinking="false" style:font-size-asian="10pt" style:font-size-complex="10pt"/>
    </style:style>
    <style:style style:name="P16" style:family="paragraph" style:parent-style-name="Text_20_body" style:list-style-name="L6">
      <style:paragraph-properties fo:margin-left="0in" fo:margin-right="0in" fo:margin-top="0in" fo:margin-bottom="0in" fo:text-indent="0in" style:auto-text-indent="false" fo:padding="0in" fo:border="none"/>
    </style:style>
    <style:style style:name="P17" style:family="paragraph" style:parent-style-name="Text_20_body" style:list-style-name="L8">
      <style:paragraph-properties fo:margin-left="0in" fo:margin-right="0in" fo:margin-top="0in" fo:margin-bottom="0in" fo:text-indent="0in" style:auto-text-indent="false" fo:padding="0in" fo:border="none"/>
    </style:style>
    <style:style style:name="P18" style:family="paragraph" style:parent-style-name="Text_20_body" style:list-style-name="L10">
      <style:paragraph-properties fo:margin-left="0in" fo:margin-right="0in" fo:margin-top="0in" fo:margin-bottom="0in" fo:text-indent="0in" style:auto-text-indent="false" fo:padding="0in" fo:border="none"/>
    </style:style>
    <style:style style:name="P19" style:family="paragraph" style:parent-style-name="Text_20_body" style:list-style-name="L12">
      <style:paragraph-properties fo:margin-left="0in" fo:margin-right="0in" fo:margin-top="0in" fo:margin-bottom="0in" fo:text-indent="0in" style:auto-text-indent="false" fo:padding="0in" fo:border="none"/>
    </style:style>
    <style:style style:name="P20" style:family="paragraph" style:parent-style-name="Text_20_body" style:list-style-name="L12">
      <style:paragraph-properties fo:margin-left="0in" fo:margin-right="0in" fo:margin-top="0in" fo:margin-bottom="0in" fo:text-indent="0in" style:auto-text-indent="false" fo:padding="0in" fo:border="none" style:writing-mode="lr-tb"/>
    </style:style>
    <style:style style:name="P21" style:family="paragraph" style:parent-style-name="Text_20_body" style:list-style-name="L6">
      <style:paragraph-properties fo:margin-left="0in" fo:margin-right="0in" fo:margin-top="0in" fo:margin-bottom="0in" fo:text-indent="0in" style:auto-text-indent="false" fo:padding-left="0in" fo:padding-right="0in" fo:padding-top="0in" fo:padding-bottom="0.0193in" fo:border-left="none" fo:border-right="none" fo:border-top="none" fo:border-bottom="0.0008in solid #f0f2f5" style:writing-mode="lr-tb"/>
    </style:style>
    <style:style style:name="P22" style:family="paragraph" style:parent-style-name="Text_20_body" style:list-style-name="L7">
      <style:paragraph-properties fo:margin-left="0in" fo:margin-right="0in" fo:margin-top="0in" fo:margin-bottom="0in" fo:text-indent="0in" style:auto-text-indent="false" fo:padding-left="0in" fo:padding-right="0in" fo:padding-top="0in" fo:padding-bottom="0.0193in" fo:border-left="none" fo:border-right="none" fo:border-top="none" fo:border-bottom="0.0008in solid #f0f2f5" style:writing-mode="lr-tb"/>
    </style:style>
    <style:style style:name="P23" style:family="paragraph" style:parent-style-name="Text_20_body" style:list-style-name="L9">
      <style:paragraph-properties fo:margin-left="0in" fo:margin-right="0in" fo:margin-top="0in" fo:margin-bottom="0in" fo:text-indent="0in" style:auto-text-indent="false" fo:padding-left="0in" fo:padding-right="0in" fo:padding-top="0in" fo:padding-bottom="0.0193in" fo:border-left="none" fo:border-right="none" fo:border-top="none" fo:border-bottom="0.0008in solid #f0f2f5" style:writing-mode="lr-tb"/>
    </style:style>
    <style:style style:name="P24" style:family="paragraph" style:parent-style-name="Text_20_body" style:list-style-name="L12">
      <style:paragraph-properties fo:margin-left="0in" fo:margin-right="0in" fo:margin-top="0in" fo:margin-bottom="0in" fo:text-indent="0in" style:auto-text-indent="false" fo:padding-left="0in" fo:padding-right="0in" fo:padding-top="0in" fo:padding-bottom="0.0193in" fo:border-left="none" fo:border-right="none" fo:border-top="none" fo:border-bottom="0.0008in solid #f0f2f5" style:writing-mode="lr-tb"/>
    </style:style>
    <style:style style:name="P25" style:family="paragraph" style:parent-style-name="Text_20_body">
      <style:paragraph-properties fo:margin-left="0in" fo:margin-right="0in" fo:margin-top="0.25in" fo:margin-bottom="0.1252in" fo:text-indent="0in" style:auto-text-indent="false" fo:padding="0in" fo:border="none"/>
      <style:text-properties style:text-line-through-style="none" style:font-name="Arial" fo:font-size="10pt" style:text-underline-style="none" fo:font-weight="bold" style:text-blinking="false" style:font-size-asian="10pt" style:font-name-complex="Arial" style:font-size-complex="10pt"/>
    </style:style>
    <style:style style:name="P26" style:family="paragraph" style:parent-style-name="Text_20_body">
      <style:paragraph-properties fo:margin-left="0in" fo:margin-right="0in" fo:margin-top="0.25in" fo:margin-bottom="0.1252in" fo:text-indent="0in" style:auto-text-indent="false" fo:padding="0in" fo:border="none"/>
      <style:text-properties style:text-line-through-style="none" style:font-name="Arial" fo:font-size="10pt" style:text-underline-style="none" fo:font-weight="bold" style:text-blinking="false" style:font-size-asian="10pt" style:font-size-complex="10pt"/>
    </style:style>
    <style:style style:name="P27" style:family="paragraph" style:parent-style-name="Standard">
      <style:text-properties style:font-name="Arial" fo:font-size="10pt" style:font-size-asian="10pt" style:font-name-complex="Arial" style:font-size-complex="10pt"/>
    </style:style>
    <style:style style:name="P28" style:family="paragraph" style:parent-style-name="Standard">
      <style:text-properties style:text-line-through-style="none" style:font-name="Arial" fo:font-size="10pt" style:text-underline-style="none" fo:font-weight="bold" style:text-blinking="false" style:font-size-asian="10pt" style:font-name-complex="Arial" style:font-size-complex="10pt"/>
    </style:style>
    <style:style style:name="P29" style:family="paragraph" style:parent-style-name="Standard">
      <style:paragraph-properties fo:margin-left="0in" fo:margin-right="0in" fo:margin-top="0.25in" fo:margin-bottom="0.1252in" fo:text-indent="0in" style:auto-text-indent="false" fo:padding="0in" fo:border="none"/>
      <style:text-properties style:text-line-through-style="none" style:font-name="Arial" fo:font-size="10pt" style:text-underline-style="none" fo:font-weight="bold" style:text-blinking="false" style:font-size-asian="10pt" style:font-name-complex="Arial" style:font-size-complex="10pt"/>
    </style:style>
    <style:style style:name="T1" style:family="text">
      <style:text-properties fo:font-weight="normal"/>
    </style:style>
    <style:style style:name="T2" style:family="text">
      <style:text-properties style:font-weight-complex="normal"/>
    </style:style>
    <style:style style:name="T3" style:family="text">
      <style:text-properties style:font-name="Google Sans" fo:font-weight="normal"/>
    </style:style>
    <style:style style:name="T4" style:family="text">
      <style:text-properties style:font-name="Google Sans" fo:font-size="12pt" fo:font-weight="normal"/>
    </style:style>
    <style:style style:name="T5" style:family="text">
      <style:text-properties style:font-name="Google Sans" fo:font-size="13.5pt" fo:font-weight="normal"/>
    </style:style>
    <style:style style:name="T6" style:family="text">
      <style:text-properties style:font-name-complex="Google Sans" style:font-weight-complex="normal"/>
    </style:style>
    <style:style style:name="T7" style:family="text">
      <style:text-properties style:font-name-complex="Google Sans" style:font-size-complex="12pt" style:font-weight-complex="normal"/>
    </style:style>
    <style:style style:name="T8" style:family="text">
      <style:text-properties style:text-line-through-style="none" style:font-name="Google Sans" style:text-underline-style="none" fo:font-weight="normal" style:text-blinking="false"/>
    </style:style>
    <style:style style:name="T9" style:family="text">
      <style:text-properties style:text-line-through-style="none" style:font-name="Google Sans" style:text-underline-style="none" fo:font-weight="bold" style:text-blinking="false"/>
    </style:style>
    <style:style style:name="T10" style:family="text">
      <style:text-properties style:text-line-through-style="none" style:font-name="Google Sans" fo:font-size="12pt" style:text-underline-style="none" fo:font-weight="normal" style:text-blinking="false"/>
    </style:style>
    <style:style style:name="T11" style:family="text">
      <style:text-properties style:text-line-through-style="none" style:font-name="Google Sans" fo:font-size="12pt" style:text-underline-style="none" fo:font-weight="bold" style:text-blinking="false"/>
    </style:style>
    <style:style style:name="T12" style:family="text">
      <style:text-properties style:text-line-through-style="none" style:font-name="Google Sans" fo:font-size="10pt" style:text-underline-style="none" fo:font-weight="normal" style:text-blinking="false" style:font-size-asian="10pt" style:font-size-complex="10pt"/>
    </style:style>
    <style:style style:name="T13" style:family="text">
      <style:text-properties style:text-line-through-style="none" style:font-name="Google Sans" fo:font-size="10pt" style:text-underline-style="none" fo:font-weight="bold" style:text-blinking="false" style:font-size-asian="10pt" style:font-size-complex="10pt"/>
    </style:style>
    <style:style style:name="T14" style:family="text">
      <style:text-properties style:text-line-through-style="none" style:font-name="monospace" style:text-underline-style="none" fo:font-weight="normal" style:text-blinking="false"/>
    </style:style>
    <style:style style:name="T15" style:family="text">
      <style:text-properties style:text-line-through-style="none" style:font-name="monospace" fo:font-size="10.5pt" style:text-underline-style="none" fo:font-weight="normal" style:text-blinking="false"/>
    </style:style>
    <style:style style:name="T16" style:family="text">
      <style:text-properties style:text-line-through-style="none" style:font-name="monospace" fo:font-size="10pt" style:text-underline-style="none" fo:font-weight="normal" style:text-blinking="false" style:font-size-asian="10pt" style:font-size-complex="10pt"/>
    </style:style>
    <style:style style:name="T17" style:family="text">
      <style:text-properties style:text-line-through-style="none" fo:font-size="10pt" style:text-underline-style="none" fo:font-weight="normal" style:text-blinking="false" style:font-size-asian="10pt" style:font-size-complex="10pt"/>
    </style:style>
    <style:style style:name="T18" style:family="text">
      <style:text-properties style:text-line-through-style="none" fo:font-size="10pt" style:text-underline-style="none" fo:font-weight="bold" style:text-blinking="false" style:font-size-asian="10pt" style:font-size-complex="10pt"/>
    </style:style>
    <style:style style:name="T19" style:family="text">
      <style:text-properties style:text-line-through-style="none" style:font-name="Arial" fo:font-size="10pt" style:text-underline-style="none" fo:font-weight="normal" style:text-blinking="false" style:font-size-asian="10pt" style:font-name-complex="Arial" style:font-size-complex="10pt"/>
    </style:style>
    <style:style style:name="T20" style:family="text">
      <style:text-properties style:text-line-through-style="none" style:font-name="Arial" fo:font-size="10pt" style:text-underline-style="none" fo:font-weight="normal" style:text-blinking="false" style:font-size-asian="10pt" style:font-size-complex="10pt"/>
    </style:style>
    <style:style style:name="T21" style:family="text">
      <style:text-properties style:text-line-through-style="none" style:font-name="Arial" fo:font-size="10pt" style:text-underline-style="none" fo:font-weight="bold" style:text-blinking="false" style:font-size-asian="10pt"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4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6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77">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9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2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6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76">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9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100 IPDRG Interview Questions (Set 2)</text:p>
      <text:p text:style-name="P29">Section 1: Advanced ICD-10-CM Guidelines &amp; Complex Sequencing</text:p>
      <text:list xml:id="list3297624030211038371" text:style-name="L1">
        <text:list-item>
          <text:p text:style-name="P3">A patient is admitted with severe sepsis due to acute transmural myocardial infarction. How do you sequence the principal diagnosis?</text:p>
        </text:list-item>
        <text:list-item>
          <text:p text:style-name="P3">If a patient is admitted with a displaced pathologic fracture of the femur due to age-related osteoporosis and falls during the stay, breaking their wrist, what is your principal diagnosis sequencing?</text:p>
        </text:list-item>
        <text:list-item>
          <text:p text:style-name="P3">How do you sequence diagnoses when a patient with end-stage renal disease (ESRD) is admitted strictly for acute fluid overload due to a missed dialysis session?</text:p>
        </text:list-item>
        <text:list-item>
          <text:p text:style-name="P3">When a patient is admitted for a kidney transplant but the surgery is cancelled post-admission due to an acute upper respiratory infection, how do you sequence the codes?</text:p>
        </text:list-item>
        <text:list-item>
          <text:p text:style-name="P3">Explain the sequencing hierarchy when a patient is admitted with a diagnosis of acute on chronic diastolic heart failure and acute respiratory failure, both present on admission.</text:p>
        </text:list-item>
        <text:list-item>
          <text:p text:style-name="P3">A patient is admitted with acute mental status changes which are later diagnosed as a combination of acute alcohol intoxication and hepatic encephalopathy. What determines your principal diagnosis?</text:p>
        </text:list-item>
        <text:list-item>
          <text:p text:style-name="P3">How do you sequence diagnoses for a pregnant patient at 24 weeks gestation who is admitted for treatment of severe major depressive disorder?</text:p>
        </text:list-item>
        <text:list-item>
          <text:p text:style-name="P3">If a patient is admitted for treatment of a localized carcinoma of the breast but is found to have hypercalcemia of malignancy requiring aggressive IV saline therapy, how do you sequence the record?</text:p>
        </text:list-item>
        <text:list-item>
          <text:p text:style-name="P3">Explain how to code and sequence an admission for an acute non-ST elevation myocardial infarction (NSTEMI) that evolves into an acute ST-elevation myocardial infarction (STEMI) during the hospital stay.</text:p>
        </text:list-item>
        <text:list-item>
          <text:p text:style-name="P3">A patient is admitted with severe generalized abdominal pain. Workup reveals both acute cholecystitis and acute appendicitis. How do you determine the principal diagnosis?</text:p>
        </text:list-item>
        <text:list-item>
          <text:p text:style-name="P3">How do you handle sequencing when a patient is admitted with an overdose of an over-the-counter pain medication that is documented as a suicide attempt?</text:p>
        </text:list-item>
        <text:list-item>
          <text:p text:style-name="P3">What are the sequencing rules when a patient is admitted with an initial episode of acute pancreatitis caused by a newly discovered malignant neoplasm of the head of the pancreas?</text:p>
        </text:list-item>
        <text:list-item>
          <text:p text:style-name="P3">If a patient is admitted with acute pyelonephritis and blood cultures are positive for MRSA without clinical signs of systemic sepsis, what is the principal diagnosis and sequencing?</text:p>
        </text:list-item>
        <text:list-item>
          <text:p text:style-name="P3">How do you sequence codes when a patient with advanced HIV is admitted primarily for treatment of a traumatic subdural hematoma?</text:p>
        </text:list-item>
        <text:list-item>
          <text:p text:style-name="P3">A patient is admitted with deep vein thrombosis (DVT) of the lower extremity that immediately embolizes into an acute pulmonary embolism in the emergency room. How do you sequence the diagnoses?</text:p>
        </text:list-item>
        <text:list-item>
          <text:p text:style-name="P14"><text:span text:style-name="T1">What is the sequencing rule when an admission is specifically for the adjustment or replacement of an</text:span><text:span text:style-name="T2">ന്ദ </text:span><text:span text:style-name="T1">indwelling urinary catheter that has become blocked?</text:span></text:p>
        </text:list-item>
        <text:list-item>
          <text:p text:style-name="P3">Explain the sequencing protocol for a patient admitted with hypertensive chronic kidney disease, stage 4, presenting with an acute gout flare-up.</text:p>
        </text:list-item>
        <text:list-item>
          <text:p text:style-name="P3">If a patient is admitted with sickle cell crisis with acute chest syndrome, how many codes are required to capture the primary condition, and how are they sequenced?</text:p>
        </text:list-item>
        <text:list-item>
          <text:p text:style-name="P3">How do you sequence a patient admitted with acute pelvic inflammatory disease (PID) who is also found to be 8 weeks pregnant?</text:p>
        </text:list-item>
        <text:list-item>
          <text:p text:style-name="P3">When a patient is admitted with acute bilateral lower lobe pneumonia and develops a pleural effusion requiring a therapeutic thoracentesis, how do you sequence the pleural effusion?</text:p>
        </text:list-item>
      </text:list>
      <text:p text:style-name="P25">Section 2: Advanced ICD-10-PCS Root Operations, Approaches, &amp; Qualifiers</text:p>
      <text:list xml:id="list5706839980426586835" text:style-name="L2">
        <text:list-item>
          <text:p text:style-name="P4">A surgeon performs a percutaneous automated mechanical lumbar discectomy. What root operation is assigned?</text:p>
        </text:list-item>
        <text:list-item>
          <text:p text:style-name="P4">During a cardiac catheterization, a physician places a temporary pacemaker lead into the right ventricle. The lead is removed 12 hours later. How do you code this procedure in PCS?</text:p>
        </text:list-item>
        <text:list-item>
          <text:p text:style-name="P4">If a surgeon performs a laparoscopic partial nephrectomy, what is the root operation, and how do you differentiate it from a total nephrectomy in the 7th character qualifier?</text:p>
        </text:list-item>
        <text:list-item>
          <text:p text:style-name="P4">A patient undergoes an open reduction and internal fixation (ORIF) of a fractured tibia using a intramedullary rod. What is the root operation?</text:p>
        </text:list-item>
        <text:list-item>
          <text:p text:style-name="P4"><text:soft-page-break/>Explain how to code a procedure where a physician performs an EGD and injects a bleeding peptic ulcer with a sclerosing agent. What is the root operation?</text:p>
        </text:list-item>
        <text:list-item>
          <text:p text:style-name="P4">What root operation is used when a patient undergoes a total knee arthroplasty using a synthetic cementless prosthesis?</text:p>
        </text:list-item>
        <text:list-item>
          <text:p text:style-name="P4">If a patient undergoes an open surgical transposition of the ulnar nerve, what root operation is selected?</text:p>
        </text:list-item>
        <text:list-item>
          <text:p text:style-name="P4">A physician performs an ultrasound-guided needle core biopsy of the liver. Identify the root operation and the qualifier character required.</text:p>
        </text:list-item>
        <text:list-item>
          <text:p text:style-name="P4">How do you code a procedure where a surgeon cuts the spinal accessory nerve to treat severe spasmodic torticollis? What is the root operation?</text:p>
        </text:list-item>
        <text:list-item>
          <text:p text:style-name="P4">What root operation is assigned when a patient undergoes a coronary artery bypass graft (CABG) using a free internal mammary artery graft?</text:p>
        </text:list-item>
        <text:list-item>
          <text:p text:style-name="P4">If a patient undergoes a surgical revision of an existing ventriculoperitoneal shunt where the distal peritoneal catheter is replaced, how many codes are required?</text:p>
        </text:list-item>
        <text:list-item>
          <text:p text:style-name="P4">A surgeon performs an open surgical division of peritoneal adhesions surrounding the small bowel. What root operation is assigned?</text:p>
        </text:list-item>
        <text:list-item>
          <text:p text:style-name="P4">How do you code a non-invasive extracorporeal shock wave lithotripsy (ESWL) of a common bile duct stone in PCS?</text:p>
        </text:list-item>
        <text:list-item>
          <text:p text:style-name="P4">What root operation is selected when a physician applies stereotactic radiosurgery (Gamma Knife) to a brain tumor?</text:p>
        </text:list-item>
        <text:list-item>
          <text:p text:style-name="P4">A patient undergoes a therapeutic plasma exchange (plasmapheresis). Which PCS section and root operation do you utilize?</text:p>
        </text:list-item>
        <text:list-item>
          <text:p text:style-name="P4">If a physician performs a rigid bronchoscopy with the removal of a mucus plug from the left lower lobe bronchus, what is the root operation?</text:p>
        </text:list-item>
        <text:list-item>
          <text:p text:style-name="P4">A surgeon creates an end-sigmoid colostomy via an open abdominal approach. What is the root operation?</text:p>
        </text:list-item>
        <text:list-item>
          <text:p text:style-name="P4">What root operation is assigned for an open surgical ligation of a varicose vein in the lower extremity?</text:p>
        </text:list-item>
        <text:list-item>
          <text:p text:style-name="P4">If a patient undergoes a continuous low-volume peritoneal dialysis for 5 days during an inpatient stay, how is this coded in PCS?</text:p>
        </text:list-item>
        <text:list-item>
          <text:p text:style-name="P4">A surgeon performs a total primary repair of a cleft palate. What root operation is assigned?</text:p>
        </text:list-item>
      </text:list>
      <text:p text:style-name="P25">Section 3: MS-DRG &amp; APR-DRG Logic, Complication Shifts, &amp; Optimization</text:p>
      <text:list xml:id="list8336205829736723043" text:style-name="L3">
        <text:list-item>
          <text:p text:style-name="P5">Explain the "Post-Acute Care Transfer Policy" (PACT) and how discharging a patient to home health care within 3 days affects hospital DRG payment.</text:p>
        </text:list-item>
        <text:list-item>
          <text:p text:style-name="P5">How does a secondary diagnosis of acute metabolic encephalopathy alter the MS-DRG assignment for a patient with a principal diagnosis of acute stroke?</text:p>
        </text:list-item>
        <text:list-item>
          <text:p text:style-name="P5">If a patient's principal diagnosis is acute subendocardial myocardial infarction (NSTEMI) and they develop hospital-acquired acute pulmonary edema, what is the DRG impact?</text:p>
        </text:list-item>
        <text:list-item>
          <text:p text:style-name="P5">Explain the concept of a "Pre-MDC" DRG and give an example of a clinical procedure that overrides all standard MDC assignments.</text:p>
        </text:list-item>
        <text:list-item>
          <text:p text:style-name="P5">How does a secondary diagnosis of severe protein-calorie malnutrition change the APR-DRG Severity of Illness (SOI) score compared to mild malnutrition?</text:p>
        </text:list-item>
        <text:list-item>
          <text:p text:style-name="P5">If a patient undergoes an operating room procedure that does not match the Major Diagnostic Category (MDC) of the principal diagnosis, what specific MS-DRG range is assigned?</text:p>
        </text:list-item>
        <text:list-item>
          <text:p text:style-name="P5">What is the DRG impact of adding an secondary code for acute blood loss anemia to a case that already contains a code for severe sepsis?</text:p>
        </text:list-item>
        <text:list-item>
          <text:p text:style-name="P5">Explain how the presence of chronic kidney disease, stage 5, impacts the MS-DRG calculation for a patient undergoing a major cardiovascular procedure.</text:p>
        </text:list-item>
        <text:list-item>
          <text:p text:style-name="P5">If a patient is admitted for a total hip replacement and has a secondary diagnosis of asymptomatic HIV infection status, does it alter the MS-DRG tier?</text:p>
        </text:list-item>
        <text:list-item>
          <text:p text:style-name="P5">How does a diagnosis of quadriplegia following an old spinal cord injury affect the DRG assignment for a medical admission for influenza?</text:p>
        </text:list-item>
        <text:list-item>
          <text:p text:style-name="P5">Explain how the MS-DRG grouper handles a secondary diagnosis code that appears on the CC Exclusion List for the assigned principal diagnosis.</text:p>
        </text:list-item>
        <text:list-item>
          <text:p text:style-name="P5">What is the financial and DRG impact of coding a body mass index (BMI) of 52 without a documented diagnosis of morbid obesity?</text:p>
        </text:list-item>
        <text:list-item>
          <text:p text:style-name="P5">How does a secondary diagnosis of acute lower gastrointestinal hemorrhage alter the DRG assignment for a patient admitted with end-stage liver disease?</text:p>
        </text:list-item>
        <text:list-item>
          <text:p text:style-name="P5">If a patient is treated with continuous mechanical ventilation for 36 hours, how does the PCS code change the <text:soft-page-break/>MS-DRG compared to 12 hours of mechanical ventilation?</text:p>
        </text:list-item>
        <text:list-item>
          <text:p text:style-name="P5">Explain how an APR-DRG assignment utilizes age and secondary diagnoses to calculate the Risk of Mortality (ROM) score.</text:p>
        </text:list-item>
        <text:list-item>
          <text:p text:style-name="P5">What happens to the DRG relative weight when a patient with acute respiratory failure is discharged to an inpatient hospice facility instead of home?</text:p>
        </text:list-item>
        <text:list-item>
          <text:p text:style-name="P5">How does coding a secondary diagnosis of tobacco use disorder affect an MS-DRG weight? (Explain the compliance rationale).</text:p>
        </text:list-item>
        <text:list-item>
          <text:p text:style-name="P5">Explain how the addition of an acute deep vein thrombosis (DVT) code alters the DRG for a patient undergoing major orthopedic spine surgery.</text:p>
        </text:list-item>
        <text:list-item>
          <text:p text:style-name="P5">What is the difference in DRG logic between a "Medical" DRG and a "Surgical" DRG when a bedside percutaneous drainage of an abscess is performed?</text:p>
        </text:list-item>
        <text:list-item>
          <text:p text:style-name="P5">How does the assignment of a code for neutropenic fever impact the DRG tier for an oncology patient receiving inpatient chemotherapy?</text:p>
        </text:list-item>
      </text:list>
      <text:p text:style-name="P25">Section 4: Complex Present on Admission (POA) &amp; Hospital-Acquired Conditions (HAC)</text:p>
      <text:list xml:id="list8543021524823325485" text:style-name="L4">
        <text:list-item>
          <text:p text:style-name="P6">A patient is admitted with a superficial skin tear that develops into a severe necrotizing fasciitis on day four. What are the POA indicators for both conditions?</text:p>
        </text:list-item>
        <text:list-item>
          <text:p text:style-name="P6">How do you assign the POA indicator for a chronic condition (like chronic systolic heart failure) that acutely decompensates on day two of admission?</text:p>
        </text:list-item>
        <text:list-item>
          <text:p text:style-name="P6">If a patient is admitted with an asymptomatic urinary tract infection that is confirmed by an ER urine culture, but the provider does not document it until day five, what is the POA indicator?</text:p>
        </text:list-item>
        <text:list-item>
          <text:p text:style-name="P6">Explain the POA assignment rule for an injury sustained during an in-hospital emergency surgical procedure.</text:p>
        </text:list-item>
        <text:list-item>
          <text:p text:style-name="P6">If a patient develops an acute deep vein thrombosis (DVT) following an inpatient orthopedic surgery, and the DVT is on the CMS HAC list, what is the exact POA indicator?</text:p>
        </text:list-item>
        <text:list-item>
          <text:p text:style-name="P6">How do you handle the POA indicator for a suspected condition documented as "rule out pulmonary embolism" at discharge, which was evaluated throughout the stay?</text:p>
        </text:list-item>
        <text:list-item>
          <text:p text:style-name="P6">A newborn is diagnosed with neonatal jaundice due to breast milk on day three of life. What POA indicator is assigned on the newborn's chart?</text:p>
        </text:list-item>
        <text:list-item>
          <text:p text:style-name="P6">If a patient is admitted with a stage 3 pressure ulcer that completely heals and closes before discharge, what is the POA indicator reported?</text:p>
        </text:list-item>
        <text:list-item>
          <text:p text:style-name="P6">What POA indicator is assigned to an external cause code representing an accidental therapeutic misadventure during an inpatient central line placement?</text:p>
        </text:list-item>
        <text:list-item>
          <text:p text:style-name="P6">How do you assign a POA indicator when the physician documents "acute renal failure, likely present prior to admission, but cannot be definitively confirmed"?</text:p>
        </text:list-item>
        <text:list-item>
          <text:p text:style-name="P6">If a patient is transferred from an outside hospital acute care floor to your facility’s ICU with an existing ventilator-associated pneumonia (VAP), what is the POA indicator at your facility?</text:p>
        </text:list-item>
        <text:list-item>
          <text:p text:style-name="P6">Explain the impact on hospital quality reporting when a surgical site infection (SSI) is coded with a POA indicator of "N".</text:p>
        </text:list-item>
        <text:list-item>
          <text:p text:style-name="P6">A patient is admitted for a scheduled elective surgery. On routine admission EKG, an acute silent myocardial infarction is discovered. What is the POA indicator?</text:p>
        </text:list-item>
        <text:list-item>
          <text:p text:style-name="P6">How do you assign the POA indicator for a secondary diagnosis of hypokalemia that is corrected in the ER but requires continuous oral supplementation on the inpatient floor?</text:p>
        </text:list-item>
        <text:list-item>
          <text:p text:style-name="P6">If the medical record contains conflicting statements between the attending surgeon ("Condition was post-operative") and the medical consultant ("Condition was present on arrival"), and the provider cannot be reached, what POA indicator applies?</text:p>
        </text:list-item>
      </text:list>
      <text:p text:style-name="P25">Section 5: CDI Collaboration, Non-Leading Queries, &amp; Documentation Integrity</text:p>
      <text:list xml:id="list6338057340591334119" text:style-name="L5">
        <text:list-item>
          <text:p text:style-name="P7">The physician documents "pancytopenia" in a patient receiving active myelosuppressive chemotherapy. What clinical indicators would prompt you to query for a more specific condition?</text:p>
        </text:list-item>
        <text:list-item>
          <text:p text:style-name="P7">A patient's chart shows an arterial blood gas (ABG) with a pH of 7.21 and a pCO2 of 68, but the physician only documents "respiratory insufficiency." Draft a compliant query concept.</text:p>
        </text:list-item>
        <text:list-item>
          <text:p text:style-name="P7">When a consultant documents "acute tubular necrosis" (ATN) but the attending physician consistently signs off writing "acute kidney injury," what are your compliant options?</text:p>
        </text:list-item>
        <text:list-item>
          <text:p text:style-name="P7">The documentation states "altered mental status" in a patient with an active urinary tract infection and a history of dementia. What specific clinical details do you look for before querying for encephalopathy?</text:p>
        </text:list-item>
        <text:list-item>
          <text:p text:style-name="P7">How do you structure a multiple-choice query for a patient with a dropping hemoglobin (14.2 to 8.1) who <text:soft-page-break/>received 2 units of packed red blood cells, without using leading phrasing?</text:p>
        </text:list-item>
        <text:list-item>
          <text:p text:style-name="P7">If a physician writes "sepsis" in the discharge summary but the clinical indicators (SIRS criteria, SOFA score, organ dysfunction) are entirely missing from the chart, what is your compliance responsibility?</text:p>
        </text:list-item>
        <text:list-item>
          <text:p text:style-name="P7">Can you construct a query that explicitly asks a physician: "Does this patient have severe malnutrition so we can capture the correct MS-DRG?" Why or why not?</text:p>
        </text:list-item>
        <text:list-item>
          <text:p text:style-name="P7">A patient is treated with IV bumex and an echo shows an ejection fraction of 25%. The provider documents "heart failure." What choices must you include in a compliant query for specificity?</text:p>
        </text:list-item>
        <text:list-item>
          <text:p text:style-name="P7">Explain the clinical and documentation differences required to query for "acute respiratory failure" versus "acute respiratory distress syndrome" (ARDS).</text:p>
        </text:list-item>
        <text:list-item>
          <text:p text:style-name="P7">If a physician responds to a electronic query by checking a box for "Acute Gastric Ulcer with Hemorrhage" but fails to update the progress notes or discharge summary, can you code it?</text:p>
        </text:list-item>
        <text:list-item>
          <text:p text:style-name="P7">The clinical indicators show a BMI of 48, a nutritionist note diagnosing "severe malnutrition," but no provider documentation. How do you proceed?</text:p>
        </text:list-item>
        <text:list-item>
          <text:p text:style-name="P7">What is the compliant way to query for "linkage" between a patient’s peripheral neuropathy and their underlying type 2 diabetes?</text:p>
        </text:list-item>
        <text:list-item>
          <text:p text:style-name="P7">A patient is admitted with a hip fracture and becomes acutely combative, pulling out IV lines. The physician prescribes heavy anti-psychotics and documents "sun-downing." What do you query for?</text:p>
        </text:list-item>
        <text:list-item>
          <text:p text:style-name="P7">Explain the risk of utilizing a "yes/no" query format when trying to establish a new, unconfirmed secondary diagnosis that acts as an MCC.</text:p>
        </text:list-item>
      </text:list>
      <text:p text:style-name="P25">Section 6: Regulatory Compliance, Payer Audits, &amp; Clinical Case Studies</text:p>
      <text:list xml:id="list7299571988997726081" text:style-name="L6">
        <text:list-item>
          <text:p text:style-name="P8">Explain how a RAC auditor utilizes the "Clinical Validation" standard to deny a coded and documented diagnosis of Sepsis-3.</text:p>
        </text:list-item>
        <text:list-item>
          <text:p text:style-name="P8">Under the Uniform Hospital Discharge Data Set (UHDDS), how do you defend the assignment of a secondary diagnosis that did not receive direct medical treatment during the stay?</text:p>
        </text:list-item>
        <text:list-item>
          <text:p text:style-name="P8">Case Study: A patient is admitted for a laparoscopic cholecystectomy. Due to dense adhesions, the surgeon spends 3 hours performing sharp lysis of adhesions before completing the cholecystectomy. How do you code this in PCS?</text:p>
        </text:list-item>
        <text:list-item>
          <text:p text:style-name="P8">Case Study: A patient with chronic systolic heart failure is admitted with acute shortness of breath. The physician documents "acute pulmonary edema due to fluid overload from non-compliance with medications." Explain your code selection and sequencing.</text:p>
        </text:list-item>
        <text:list-item>
          <text:p text:style-name="P8">What is the compliance implication of "Upcoding" a medical case to a surgical case by utilizing an incorrect interpretation of an invasive diagnostic procedure?</text:p>
        </text:list-item>
        <text:list-item>
          <text:p text:style-name="P8">Case Study: A patient is admitted with a principal diagnosis of acute ischemic stroke. On day two, the patient aspirates on food and develops aspiration pneumonia. On day four, the patient suffers an acute NSTEMI. Sequence and identify the CC/MCC impacts.</text:p>
        </text:list-item>
        <text:list-item>
          <text:p text:style-name="P8">Explain the regulatory difference between an inpatient "Hospital-Acquired Condition" (HAC) penalty and a "Hospital Readmissions Reduction Program" (HRRP) penalty.</text:p>
        </text:list-item>
        <text:list-item>
          <text:p text:style-name="P8">Case Study: A patient is admitted for a severe asthma attack. The physician documents "status asthmaticus." The coder notes the patient was treated with a single albuterol nebulizer treatment and discharged within 6 hours. What is the compliance risk here?</text:p>
        </text:list-item>
        <text:list-item>
          <text:p text:style-name="P21"><text:span text:style-name="T19">How do you respond to an internal audit finding that shows your facility has an abnormally high rate of assigning code </text:span><text:span text:style-name="Source_20_Text"><text:span text:style-name="T19">R65.21</text:span></text:span><text:span text:style-name="T19"> (Severe sepsis with septic shock) compared to regional averages?</text:span></text:p>
        </text:list-item>
        <text:list-item>
          <text:p text:style-name="P16"><text:span text:style-name="T19">How do the official coding guidelines handle the assignment of codes for conditions that are documented </text:span><text:span text:style-name="Emphasis"><text:span text:style-name="T19">only</text:span></text:span><text:span text:style-name="T19"> in a pathology report, without corresponding provider documentation in the main body of the medical record?</text:span></text:p>
        </text:list-item>
      </text:list>
      <text:p text:style-name="P27"/>
      <text:p text:style-name="P27">Answers:</text:p>
      <text:p text:style-name="P28">Section 1: ICD-10-CM Coding Guidelines &amp; Sequencing</text:p>
      <text:list xml:id="list9221833448070103666" text:style-name="L7">
        <text:list-item>
          <text:p text:style-name="P22"><text:span text:style-name="T20">STEMI (</text:span><text:span text:style-name="Source_20_Text"><text:span text:style-name="T20">I21.0-</text:span></text:span><text:span text:style-name="T20">-</text:span><text:span text:style-name="Source_20_Text"><text:span text:style-name="T20">I21.3</text:span></text:span><text:span text:style-name="T20">).</text:span></text:p>
        </text:list-item>
        <text:list-item>
          <text:p text:style-name="P22"><text:span text:style-name="T20">Traumatic fracture (</text:span><text:span text:style-name="Source_20_Text"><text:span text:style-name="T20">S82.-</text:span></text:span><text:span text:style-name="T20">) first; cellulitis (</text:span><text:span text:style-name="Source_20_Text"><text:span text:style-name="T20">L03.-</text:span></text:span><text:span text:style-name="T20">) second.</text:span></text:p>
        </text:list-item>
        <text:list-item>
          <text:p text:style-name="P22"><text:span text:style-name="T20">Dysphagia (</text:span><text:span text:style-name="Source_20_Text"><text:span text:style-name="T20">R13.1-</text:span></text:span><text:span text:style-name="T20">) first; sequela code (</text:span><text:span text:style-name="Source_20_Text"><text:span text:style-name="T20">I69.391</text:span></text:span><text:span text:style-name="T20">) second.</text:span></text:p>
        </text:list-item>
        <text:list-item>
          <text:p text:style-name="P22"><text:span text:style-name="T20">Traumatic injury first; Asymptomatic HIV (</text:span><text:span text:style-name="Source_20_Text"><text:span text:style-name="T20">Z21</text:span></text:span><text:span text:style-name="T20">) second.</text:span></text:p>
        </text:list-item>
        <text:list-item>
          <text:p text:style-name="P9">Nature of adverse effect first; T-code therapeutic column fifth/sixth character "5" second.</text:p>
        </text:list-item>
        <text:list-item>
          <text:p text:style-name="P22"><text:span text:style-name="T20">Transplant/chronic kidney code first; COVID-19 (</text:span><text:span text:style-name="Source_20_Text"><text:span text:style-name="T20">U07.1</text:span></text:span><text:span text:style-name="T20">) and cancellation codes (</text:span><text:span text:style-name="Source_20_Text"><text:span text:style-name="T20">Z53.09</text:span></text:span><text:span text:style-name="T20">) second.</text:span></text:p>
        </text:list-item>
        <text:list-item>
          <text:p text:style-name="P22"><text:span text:style-name="T20">Device-related complication (</text:span><text:span text:style-name="Source_20_Text"><text:span text:style-name="T20">T83.51-</text:span></text:span><text:span text:style-name="T20">) first; Toxic shock (</text:span><text:span text:style-name="Source_20_Text"><text:span text:style-name="T20">A48.3</text:span></text:span><text:span text:style-name="T20">) and organism codes second.</text:span></text:p>
        </text:list-item>
        <text:list-item>
          <text:p text:style-name="P22"><text:soft-page-break/><text:span text:style-name="T20">Acute Respiratory Failure (</text:span><text:span text:style-name="Source_20_Text"><text:span text:style-name="T20">J96.0-</text:span></text:span><text:span text:style-name="T20">) if requiring immediate separate ventilation/intubation; otherwise, diastolic heart failure (</text:span><text:span text:style-name="Source_20_Text"><text:span text:style-name="T20">I50.33</text:span></text:span><text:span text:style-name="T20">).</text:span></text:p>
        </text:list-item>
        <text:list-item>
          <text:p text:style-name="P22"><text:span text:style-name="T20">Primary osteoarthritis (</text:span><text:span text:style-name="Source_20_Text"><text:span text:style-name="T20">M17.1-</text:span></text:span><text:span text:style-name="T20">) first; postoperative PE (</text:span><text:span text:style-name="Source_20_Text"><text:span text:style-name="T20">I26.92</text:span></text:span><text:span text:style-name="T20"> or </text:span><text:span text:style-name="Source_20_Text"><text:span text:style-name="T20">T81.718A</text:span></text:span><text:span text:style-name="T20">) second.</text:span></text:p>
        </text:list-item>
        <text:list-item>
          <text:p text:style-name="P22"><text:span text:style-name="T20">Acute alcoholic hepatitis (</text:span><text:span text:style-name="Source_20_Text"><text:span text:style-name="T20">K70.1-</text:span></text:span><text:span text:style-name="T20">) first; alcohol withdrawal delirium (</text:span><text:span text:style-name="Source_20_Text"><text:span text:style-name="T20">F10.231</text:span></text:span><text:span text:style-name="T20">) second.</text:span></text:p>
        </text:list-item>
        <text:list-item>
          <text:p text:style-name="P22"><text:span text:style-name="T20">Chapter 15 complication code (</text:span><text:span text:style-name="Source_20_Text"><text:span text:style-name="T20">O99.89</text:span></text:span><text:span text:style-name="T20">) first; acute appendicitis (</text:span><text:span text:style-name="Source_20_Text"><text:span text:style-name="T20">K35.-</text:span></text:span><text:span text:style-name="T20">) second.</text:span></text:p>
        </text:list-item>
        <text:list-item>
          <text:p text:style-name="P22"><text:span text:style-name="T20">Hypertensive crisis/heart disease combination (</text:span><text:span text:style-name="Source_20_Text"><text:span text:style-name="T20">I11.0</text:span></text:span><text:span text:style-name="T20">) first; acute heart failure type (</text:span><text:span text:style-name="Source_20_Text"><text:span text:style-name="T20">I50.-</text:span></text:span><text:span text:style-name="T20">) second.</text:span></text:p>
        </text:list-item>
        <text:list-item>
          <text:p text:style-name="P22"><text:span text:style-name="T20">Underlying physical condition first; suicidal ideation (</text:span><text:span text:style-name="Source_20_Text"><text:span text:style-name="T20">R45.851</text:span></text:span><text:span text:style-name="T20">) or psychiatric disorder second.</text:span></text:p>
        </text:list-item>
        <text:list-item>
          <text:p text:style-name="P22"><text:span text:style-name="T20">Acute-on-chronic liver failure (</text:span><text:span text:style-name="Source_20_Text"><text:span text:style-name="T20">K72.1-</text:span></text:span><text:span text:style-name="T20">).</text:span></text:p>
        </text:list-item>
        <text:list-item>
          <text:p text:style-name="P22"><text:span text:style-name="T20">Complication code for infected vascular device (</text:span><text:span text:style-name="Source_20_Text"><text:span text:style-name="T20">T80.211A</text:span></text:span><text:span text:style-name="T20">) first; sepsis (</text:span><text:span text:style-name="Source_20_Text"><text:span text:style-name="T20">A41.9</text:span></text:span><text:span text:style-name="T20">) and </text:span><text:span text:style-name="Source_20_Text"><text:span text:style-name="T20">R65.2-</text:span></text:span><text:span text:style-name="T20"> second.</text:span></text:p>
        </text:list-item>
        <text:list-item>
          <text:p text:style-name="P22"><text:span text:style-name="T20">NSTEMI code (</text:span><text:span text:style-name="Source_20_Text"><text:span text:style-name="T20">I21.4</text:span></text:span><text:span text:style-name="T20">).</text:span></text:p>
        </text:list-item>
        <text:list-item>
          <text:p text:style-name="P22"><text:span text:style-name="T20">Metabolic hypercalcemia (</text:span><text:span text:style-name="Source_20_Text"><text:span text:style-name="T20">E83.52</text:span></text:span><text:span text:style-name="T20">) first; lung malignancy (</text:span><text:span text:style-name="Source_20_Text"><text:span text:style-name="T20">C34.-</text:span></text:span><text:span text:style-name="T20">) second.</text:span></text:p>
        </text:list-item>
        <text:list-item>
          <text:p text:style-name="P22"><text:span text:style-name="T20">Acute ischemic stroke (</text:span><text:span text:style-name="Source_20_Text"><text:span text:style-name="T20">I63.-</text:span></text:span><text:span text:style-name="T20">).</text:span></text:p>
        </text:list-item>
        <text:list-item>
          <text:p text:style-name="P22"><text:span text:style-name="T20">Poisoning/toxic effect code from Chapter 19 (</text:span><text:span text:style-name="Source_20_Text"><text:span text:style-name="T20">T40.-</text:span></text:span><text:span text:style-name="T20">) first; AKI (</text:span><text:span text:style-name="Source_20_Text"><text:span text:style-name="T20">N17.9</text:span></text:span><text:span text:style-name="T20">) second.</text:span></text:p>
        </text:list-item>
        <text:list-item>
          <text:p text:style-name="P22"><text:span text:style-name="T20">Uterine fibroids (</text:span><text:span text:style-name="Source_20_Text"><text:span text:style-name="T20">D25.-</text:span></text:span><text:span text:style-name="T20">) if targeting source; chronic blood loss anemia (</text:span><text:span text:style-name="Source_20_Text"><text:span text:style-name="T20">D50.0</text:span></text:span><text:span text:style-name="T20">) if stay was transfusions only.</text:span></text:p>
        </text:list-item>
      </text:list>
      <text:p text:style-name="P26">Section 2: ICD-10-PCS Root Operations &amp; Approach</text:p>
      <text:list xml:id="list7241864309783566833" text:style-name="L8">
        <text:list-item>
          <text:p text:style-name="P17"><text:span text:style-name="Strong_20_Emphasis"><text:span text:style-name="T21">Release</text:span></text:span><text:span text:style-name="T20"> frees a body part from constraint; </text:span><text:span text:style-name="Strong_20_Emphasis"><text:span text:style-name="T21">Division</text:span></text:span><text:span text:style-name="T20"> cuts/transects a body part to separate it.</text:span></text:p>
        </text:list-item>
        <text:list-item>
          <text:p text:style-name="P17"><text:span text:style-name="Strong_20_Emphasis"><text:span text:style-name="T21">Occlusion</text:span></text:span><text:span text:style-name="T20"> completely closes a lumen; </text:span><text:span text:style-name="Strong_20_Emphasis"><text:span text:style-name="T21">Restriction</text:span></text:span><text:span text:style-name="T20"> only partially closes/narrows it.</text:span></text:p>
        </text:list-item>
        <text:list-item>
          <text:p text:style-name="P17"><text:span text:style-name="Strong_20_Emphasis"><text:span text:style-name="T21">Removal</text:span></text:span><text:span text:style-name="T20">.</text:span></text:p>
        </text:list-item>
        <text:list-item>
          <text:p text:style-name="P17"><text:span text:style-name="Strong_20_Emphasis"><text:span text:style-name="T21">Excision</text:span></text:span><text:span text:style-name="T20">.</text:span></text:p>
        </text:list-item>
        <text:list-item>
          <text:p text:style-name="P17"><text:span text:style-name="Strong_20_Emphasis"><text:span text:style-name="T21">Extirpation</text:span></text:span><text:span text:style-name="T20">.</text:span></text:p>
        </text:list-item>
        <text:list-item>
          <text:p text:style-name="P17"><text:span text:style-name="Strong_20_Emphasis"><text:span text:style-name="T21">Drainage</text:span></text:span><text:span text:style-name="T20"> with qualifier "Diagnostic".</text:span></text:p>
        </text:list-item>
        <text:list-item>
          <text:p text:style-name="P17"><text:span text:style-name="Strong_20_Emphasis"><text:span text:style-name="T21">Supplement</text:span></text:span><text:span text:style-name="T20">.</text:span></text:p>
        </text:list-item>
        <text:list-item>
          <text:p text:style-name="P17"><text:span text:style-name="Strong_20_Emphasis"><text:span text:style-name="T21">Replacement</text:span></text:span><text:span text:style-name="T20">.</text:span></text:p>
        </text:list-item>
        <text:list-item>
          <text:p text:style-name="P17"><text:span text:style-name="Strong_20_Emphasis"><text:span text:style-name="T21">Reposition</text:span></text:span><text:span text:style-name="T20"> with built-in internal fixation device character.</text:span></text:p>
        </text:list-item>
        <text:list-item>
          <text:p text:style-name="P17"><text:span text:style-name="Strong_20_Emphasis"><text:span text:style-name="T21">Bypass</text:span></text:span><text:span text:style-name="T20">.</text:span></text:p>
        </text:list-item>
        <text:list-item>
          <text:p text:style-name="P17"><text:span text:style-name="Strong_20_Emphasis"><text:span text:style-name="T21">Bypass</text:span></text:span><text:span text:style-name="T20">.</text:span></text:p>
        </text:list-item>
        <text:list-item>
          <text:p text:style-name="P17"><text:span text:style-name="Strong_20_Emphasis"><text:span text:style-name="T21">Excision</text:span></text:span><text:span text:style-name="T20"> with qualifier "Diagnostic" and approach "Percutaneous".</text:span></text:p>
        </text:list-item>
        <text:list-item>
          <text:p text:style-name="P17"><text:span text:style-name="Strong_20_Emphasis"><text:span text:style-name="T21">Destruction</text:span></text:span><text:span text:style-name="T20">.</text:span></text:p>
        </text:list-item>
        <text:list-item>
          <text:p text:style-name="P17"><text:span text:style-name="Strong_20_Emphasis"><text:span text:style-name="T21">Excision</text:span></text:span><text:span text:style-name="T20">.</text:span></text:p>
        </text:list-item>
        <text:list-item>
          <text:p text:style-name="P17"><text:span text:style-name="Strong_20_Emphasis"><text:span text:style-name="T21">Introduction</text:span></text:span><text:span text:style-name="T20"> under Section 3 (Administration).</text:span></text:p>
        </text:list-item>
        <text:list-item>
          <text:p text:style-name="P17"><text:span text:style-name="Strong_20_Emphasis"><text:span text:style-name="T21">Packing</text:span></text:span><text:span text:style-name="T20"> under Section 2 (Placement).</text:span></text:p>
        </text:list-item>
        <text:list-item>
          <text:p text:style-name="P17"><text:span text:style-name="Strong_20_Emphasis"><text:span text:style-name="T21">Version</text:span></text:span><text:span text:style-name="T20"> under Section 1 (Obstetrics).</text:span></text:p>
        </text:list-item>
        <text:list-item>
          <text:p text:style-name="P17"><text:span text:style-name="Strong_20_Emphasis"><text:span text:style-name="T21">Occlusion</text:span></text:span><text:span text:style-name="T20">.</text:span></text:p>
        </text:list-item>
        <text:list-item>
          <text:p text:style-name="P17"><text:span text:style-name="Strong_20_Emphasis"><text:span text:style-name="T21">Extraction</text:span></text:span><text:span text:style-name="T20">.</text:span></text:p>
        </text:list-item>
        <text:list-item>
          <text:p text:style-name="P17"><text:span text:style-name="Strong_20_Emphasis"><text:span text:style-name="T21">Alteration</text:span></text:span><text:span text:style-name="T20">.</text:span></text:p>
        </text:list-item>
      </text:list>
      <text:p text:style-name="P26">Section 3: DRG Logic, MCC, &amp; CC Impact</text:p>
      <text:list xml:id="list10473685604640307" text:style-name="L9">
        <text:list-item>
          <text:p text:style-name="P10">It acts as an MCC, upgrading the simple UTI case to a higher-weighted "UTG with MCC" tier.</text:p>
        </text:list-item>
        <text:list-item>
          <text:p text:style-name="P10">No, it is classified as a non-CC/MCC.</text:p>
        </text:list-item>
        <text:list-item>
          <text:p text:style-name="P23"><text:span text:style-name="T20">Agranulocytosis (</text:span><text:span text:style-name="Source_20_Text"><text:span text:style-name="T20">D70.9</text:span></text:span><text:span text:style-name="T20">), aplastic crises, and severe symptomatic thrombocytopenia with bleeding (</text:span><text:span text:style-name="Source_20_Text"><text:span text:style-name="T20">D69.6</text:span></text:span><text:span text:style-name="T20">).</text:span></text:p>
        </text:list-item>
        <text:list-item>
          <text:p text:style-name="P10">Severe malnutrition is an MCC; mild/moderate malnutrition is only a CC.</text:p>
        </text:list-item>
        <text:list-item>
          <text:p text:style-name="P10">The grouper moves the case into a higher-paying medical or surgical DRG category due to resource intensity.</text:p>
        </text:list-item>
        <text:list-item>
          <text:p text:style-name="P10">It acts as a CC, upgrading baseline non-CC DRGs.</text:p>
        </text:list-item>
        <text:list-item>
          <text:p text:style-name="P10">It pulls the case into a major nervous system surgical DRG tier, heavily increasing case weight.</text:p>
        </text:list-item>
        <text:list-item>
          <text:p text:style-name="P10">History codes represent inactive conditions requiring no acute resource expenditure during the current stay.</text:p>
        </text:list-item>
        <text:list-item>
          <text:p text:style-name="P10">It indicates an impossible/invalid code combination, causing a billing hold or immediate claim rejection.</text:p>
        </text:list-item>
        <text:list-item>
          <text:p text:style-name="P10">It shifts the case from a standard tier directly into the "Major Joint Replacement with MCC" tier.</text:p>
        </text:list-item>
        <text:list-item>
          <text:p text:style-name="P10">It acts as an MCC, upgrading the surgical case to the highest complication tier.</text:p>
        </text:list-item>
        <text:list-item>
          <text:p text:style-name="P23"><text:soft-page-break/><text:span text:style-name="T20">Cachexia (</text:span><text:span text:style-name="Source_20_Text"><text:span text:style-name="T20">R64</text:span></text:span><text:span text:style-name="T20">) is a CC; severe protein-calorie malnutrition (</text:span><text:span text:style-name="Source_20_Text"><text:span text:style-name="T20">E43</text:span></text:span><text:span text:style-name="T20">) is an MCC.</text:span></text:p>
        </text:list-item>
        <text:list-item>
          <text:p text:style-name="P10">They are elite categories (transplants, tracheostomies) whose massive resource use bypasses standard MDCs entirely based on procedure.</text:p>
        </text:list-item>
        <text:list-item>
          <text:p text:style-name="P23"><text:span text:style-name="T20">HIT (</text:span><text:span text:style-name="Source_20_Text"><text:span text:style-name="T20">D75.82</text:span></text:span><text:span text:style-name="T20">) acts as an MCC, raising the case to the highest-paying tier.</text:span></text:p>
        </text:list-item>
        <text:list-item>
          <text:p text:style-name="P10">It is a highly common, low-severity chronic condition requiring minimal extra acute care resources.</text:p>
        </text:list-item>
        <text:list-item>
          <text:p text:style-name="P10">It acts as an MCC, immediately shifting the acute cholecystitis case to the highest complication tier.</text:p>
        </text:list-item>
        <text:list-item>
          <text:p text:style-name="P10">The grouper suppresses the CC mechanism, treating the secondary code as a non-CC because it is clinically redundant.</text:p>
        </text:list-item>
        <text:list-item>
          <text:p text:style-name="P10">Resolution within 24 hours groups to a TIA DRG; persistence maps to an Acute Ischemic Stroke DRG with a higher relative weight.</text:p>
        </text:list-item>
        <text:list-item>
          <text:p text:style-name="P23"><text:span text:style-name="T20">Stage 4 CKD is a CC; ESRD (</text:span><text:span text:style-name="Source_20_Text"><text:span text:style-name="T20">N18.6</text:span></text:span><text:span text:style-name="T20">) is a higher-priority CC or influences specific chronic care tiers.</text:span></text:p>
        </text:list-item>
        <text:list-item>
          <text:p text:style-name="P10">The code is assignable, but without the BMI code (</text:p>
          <text:p text:style-name="P15"><draw:frame draw:style-name="fr1" draw:name="graphics1" text:anchor-type="as-char" svg:width="0.3752in" svg:height="0.25in" draw:z-index="0"><draw:image xlink:href="data:image/png;base64,iVBORw0KGgoAAAANSUhEUgAAACQAAAAYCAYAAACSuF9OAAAAPklEQVR4AezSsREAMAjEMI79h2YEtxRK+01OeOfZ86E6CCFCJVC7hgiVQO0aIlQCtWuIUAnUriFCJVD7u4YOAAD//4vPw/wAAAAGSURBVAMAYX8AMTuL1F8AAAAASUVORK5CYII=" xlink:type="simple" xlink:show="embed" xlink:actuate="onLoad"/></draw:frame></text:p>
          <text:p text:style-name="P15">≥<text:span text:style-name="T1">40is greater than or equal to 40</text:span></text:p>
          <text:p text:style-name="P1">≥<text:span text:style-name="T1">40</text:span></text:p>
          <text:p text:style-name="P2">), commercial payers may deny the CC weight on audit.</text:p>
        </text:list-item>
      </text:list>
      <text:p text:style-name="P26">Section 4: Present on Admission (POA) &amp; Hospital-Acquired Conditions (HAC)</text:p>
      <text:list xml:id="list1299754101835223985" text:style-name="L10">
        <text:list-item>
          <text:p text:style-name="P18"><text:span text:style-name="Strong_20_Emphasis"><text:span text:style-name="T21">Y</text:span></text:span><text:span text:style-name="T20"> (Present on admission).</text:span></text:p>
        </text:list-item>
        <text:list-item>
          <text:p text:style-name="P18"><text:span text:style-name="Strong_20_Emphasis"><text:span text:style-name="T21">Y</text:span></text:span><text:span text:style-name="T20"> (Present at the time the formal inpatient admission order was executed).</text:span></text:p>
        </text:list-item>
        <text:list-item>
          <text:p text:style-name="P18"><text:span text:style-name="T20">DVT is assigned </text:span><text:span text:style-name="Strong_20_Emphasis"><text:span text:style-name="T21">Y</text:span></text:span><text:span text:style-name="T20">; the secondary PE is assigned </text:span><text:span text:style-name="Strong_20_Emphasis"><text:span text:style-name="T21">N</text:span></text:span><text:span text:style-name="T20">.</text:span></text:p>
        </text:list-item>
        <text:list-item>
          <text:p text:style-name="P18"><text:span text:style-name="Strong_20_Emphasis"><text:span text:style-name="T21">Y</text:span></text:span><text:span text:style-name="T20"> (Physically present in the patient at the time of admission).</text:span></text:p>
        </text:list-item>
        <text:list-item>
          <text:p text:style-name="P18"><text:span text:style-name="Strong_20_Emphasis"><text:span text:style-name="T21">Y</text:span></text:span><text:span text:style-name="T20">.</text:span></text:p>
        </text:list-item>
        <text:list-item>
          <text:p text:style-name="P18"><text:span text:style-name="Strong_20_Emphasis"><text:span text:style-name="T21">N</text:span></text:span><text:span text:style-name="T20">.</text:span></text:p>
        </text:list-item>
        <text:list-item>
          <text:p text:style-name="P18"><text:span text:style-name="T20">Do not code if discarded. If managed as a suspected condition, assign </text:span><text:span text:style-name="Strong_20_Emphasis"><text:span text:style-name="T21">Y</text:span></text:span><text:span text:style-name="T20"> if structural symptoms were present on admission.</text:span></text:p>
        </text:list-item>
        <text:list-item>
          <text:p text:style-name="P18"><text:span text:style-name="Strong_20_Emphasis"><text:span text:style-name="T21">N</text:span></text:span><text:span text:style-name="T20">.</text:span></text:p>
        </text:list-item>
        <text:list-item>
          <text:p text:style-name="P11">CMS does not penalise the hospital, acknowledging the provider could not confirm its presence despite initial signs.</text:p>
        </text:list-item>
        <text:list-item>
          <text:p text:style-name="P18"><text:span text:style-name="Strong_20_Emphasis"><text:span text:style-name="T21">Y</text:span></text:span><text:span text:style-name="T20"> (Manifest or evolving at the time the formal inpatient admission order was signed).</text:span></text:p>
        </text:list-item>
        <text:list-item>
          <text:p text:style-name="P18"><text:span text:style-name="Strong_20_Emphasis"><text:span text:style-name="T21">Y</text:span></text:span><text:span text:style-name="T20">.</text:span></text:p>
        </text:list-item>
        <text:list-item>
          <text:p text:style-name="P18"><text:span text:style-name="Strong_20_Emphasis"><text:span text:style-name="T21">Y</text:span></text:span><text:span text:style-name="T20"> (Physically present inside the patient at the time of admission).</text:span></text:p>
        </text:list-item>
        <text:list-item>
          <text:p text:style-name="P18"><text:span text:style-name="Strong_20_Emphasis"><text:span text:style-name="T21">N</text:span></text:span><text:span text:style-name="T20">.</text:span></text:p>
        </text:list-item>
        <text:list-item>
          <text:p text:style-name="P18"><text:span text:style-name="Strong_20_Emphasis"><text:span text:style-name="T21">N</text:span></text:span><text:span text:style-name="T20"> (Not manifest or present at the exact second of birth).</text:span></text:p>
        </text:list-item>
        <text:list-item>
          <text:p text:style-name="P18"><text:span text:style-name="T20">Query provider; if undetermined, assign </text:span><text:span text:style-name="Strong_20_Emphasis"><text:span text:style-name="T21">W</text:span></text:span><text:span text:style-name="T20">.</text:span></text:p>
        </text:list-item>
      </text:list>
      <text:p text:style-name="P26">Section 5: CDI Collaboration &amp; Physician Queries</text:p>
      <text:list xml:id="list1264709290233881295" text:style-name="L11">
        <text:list-item>
          <text:p text:style-name="P12">Present blood cultures and vital signs; query to clarify if condition represents "Sepsis due to a urinary tract infection".</text:p>
        </text:list-item>
        <text:list-item>
          <text:p text:style-name="P12">Query for specific acuity and type: "Chronic systolic heart failure".</text:p>
        </text:list-item>
        <text:list-item>
          <text:p text:style-name="P12">Markedly elevated AST/ALT, prolonged PT/INR, and clinical signs of encephalopathy without underlying cirrhosis.</text:p>
        </text:list-item>
        <text:list-item>
          <text:p text:style-name="P12">Present X-ray reports and dysphagia consult; query to clarify type of pneumonia (aspiration vs. simple).</text:p>
        </text:list-item>
        <text:list-item>
          <text:p text:style-name="P12">Present Hgb/Hct drop, intraoperative blood loss, and transfusion; query to clarify if "Acute posthemorrhagic anemia".</text:p>
        </text:list-item>
        <text:list-item>
          <text:p text:style-name="P12">When querying for a brand-new, unconfirmed definitive diagnosis not yet named in the record.</text:p>
        </text:list-item>
        <text:list-item>
          <text:p text:style-name="P12">Query attending to resolve conflict, noting the consultant's documentation of ATN; ATN cannot be coded without resolution.</text:p>
        </text:list-item>
        <text:list-item>
          <text:p text:style-name="P12">Temp &gt;38°C or &lt;36°C, HR &gt;90, RR &gt;20, WBC &gt;12,000 following severe physical trauma without an infectious source.</text:p>
        </text:list-item>
        <text:list-item>
          <text:p text:style-name="P12">Query to clarify if condition represents "Severe or acute symptomatic hyponatremia".</text:p>
        </text:list-item>
        <text:list-item>
          <text:p text:style-name="P12"><text:soft-page-break/>It violates the AHIMA/ACDIS code of ethics by making the query financially driven and leading.</text:p>
        </text:list-item>
        <text:list-item>
          <text:p text:style-name="P12">Inform provider the clarification must be officially entered, dated, and signed within the permanent electronic medical record.</text:p>
        </text:list-item>
        <text:list-item>
          <text:p text:style-name="P12">Present elevated troponin in setting of extreme anemia, tachyarrhythmia, or shock without plaque rupture evidence; query to clarify.</text:p>
        </text:list-item>
        <text:list-item>
          <text:p text:style-name="P12">Query for "Acute respiratory failure".</text:p>
        </text:list-item>
        <text:list-item>
          <text:p text:style-name="P12">Present documentation of bedridden status, total ADL care, and severe dementia/frailty; query to clarify "functional quadriplegia".</text:p>
        </text:list-item>
        <text:list-item>
          <text:p text:style-name="P12">No; every query response must be formally authenticated with a valid signature and date to pass compliance audits.</text:p>
        </text:list-item>
      </text:list>
      <text:p text:style-name="P26">Section 6: Regulatory Compliance, Audits, &amp; Case Studies</text:p>
      <text:list xml:id="list6744043957830925412" text:style-name="L12">
        <text:list-item>
          <text:p text:style-name="P13">It provides comparative statistics identifying a hospital's coding vulnerabilities and outlier trends in high-risk DRGs.</text:p>
        </text:list-item>
        <text:list-item>
          <text:p text:style-name="P13">Tracks unplanned readmissions within a window caused by complications; accurate coding tracks this quality metric.</text:p>
        </text:list-item>
        <text:list-item>
          <text:p text:style-name="P20"><text:span text:style-name="T20">Code </text:span><text:span text:style-name="Source_20_Text"><text:span text:style-name="T20">K35.20</text:span></text:span><text:span text:style-name="T20"> or </text:span><text:span text:style-name="Source_20_Text"><text:span text:style-name="T20">K35.32</text:span></text:span><text:span text:style-name="T20"> as principal depending on detail; code appendectomy under root operation </text:span><text:span text:style-name="Strong_20_Emphasis"><text:span text:style-name="T21">Resection</text:span></text:span><text:span text:style-name="T20">.</text:span></text:p>
        </text:list-item>
        <text:list-item>
          <text:p text:style-name="P13">It leads to coding historical, resolved, or inaccurate conditions, exposing the facility to recoupments on audit.</text:p>
        </text:list-item>
        <text:list-item>
          <text:p text:style-name="P13">Point to specific "includes," "excludes1," or "code also" notes within the Tabular List validating concurrent reporting.</text:p>
        </text:list-item>
        <text:list-item>
          <text:p text:style-name="P24"><text:span text:style-name="T20">Dehydration (</text:span><text:span text:style-name="Source_20_Text"><text:span text:style-name="T20">E86.0</text:span></text:span><text:span text:style-name="T20">) under Inpatient Guideline Chapter 2 for admissions entirely targeting dehydration management.</text:span></text:p>
        </text:list-item>
        <text:list-item>
          <text:p text:style-name="P13">Deliberately assigning an inaccurate, higher-weighted code/DRG tier than clinically supported; causes treble damages and penalties.</text:p>
        </text:list-item>
        <text:list-item>
          <text:p text:style-name="P19"><text:span text:style-name="Strong_20_Emphasis"><text:span text:style-name="T21">Supplement</text:span></text:span><text:span text:style-name="T20">.</text:span></text:p>
        </text:list-item>
        <text:list-item>
          <text:p text:style-name="P13">Coding audit checks if codes match written words; clinical validation checks if labs/vitals confirm the diagnosis definition.</text:p>
        </text:list-item>
        <text:list-item>
          <text:p text:style-name="P13">Override software; official written guidelines always take legal precedence over automated encoder software logic.</text:p>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Arial, sans-serif"/>
    <style:font-face style:name="monospace" svg:font-family="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6-04T14:50:02.81</meta:creation-date>
    <meta:document-statistic meta:table-count="0" meta:image-count="1" meta:object-count="0" meta:page-count="7" meta:paragraph-count="217" meta:word-count="3817" meta:character-count="24407"/>
    <dc:date>2026-06-04T14:55:29.90</dc:date>
    <meta:editing-duration>PT5M27S</meta:editing-duration>
    <meta:editing-cycles>1</meta:editing-cycles>
    <meta:generator>OpenOffice/4.1.14$Win32 OpenOffice.org_project/4114m1$Build-9811</meta:generator>
  </office:meta>
</office:document-meta>
</file>